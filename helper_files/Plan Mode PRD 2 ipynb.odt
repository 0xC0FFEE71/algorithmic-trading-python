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text-indent="0in" style:auto-text-indent="false" fo:padding="0in" fo:border="none"/>
      <style:text-properties officeooo:rsid="001a2abe" officeooo:paragraph-rsid="001a2abe"/>
    </style:style>
    <style:style style:name="T1" style:family="text">
      <style:text-properties officeooo:rsid="001a2abe"/>
    </style:style>
    <style:style style:name="T2" style:family="text">
      <style:text-properties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are planning the implementation of the <text:span text:style-name="T1">attached</text:span> PRD as a Jupyter Notebook.<text:line-break/>Your task in this step is <text:span text:style-name="Strong_20_Emphasis"><text:span text:style-name="T2">only to design the notebook structure</text:span></text:span>, not to write any code.</text:p>
      <text:p text:style-name="P1"><text:span text:style-name="Strong_20_Emphasis"><text:span text:style-name="T2">Requirements:</text:span></text:span></text:p>
      <text:list text:style-name="L1">
        <text:list-item>
          <text:p text:style-name="P2"><text:span text:style-name="Strong_20_Emphasis"><text:span text:style-name="T2">Goal of this step</text:span></text:span></text:p>
          <text:list>
            <text:list-item>
              <text:p text:style-name="P2">Thoroughly plan the implementation by creating a <text:span text:style-name="Strong_20_Emphasis"><text:span text:style-name="T2">reasonable notebook skeleton</text:span></text:span>.</text:p>
            </text:list-item>
            <text:list-item>
              <text:p text:style-name="P2">The skeleton must break the program into <text:span text:style-name="Strong_20_Emphasis"><text:span text:style-name="T2">bite‑sized code blocks</text:span></text:span>, each preceded by a Markdown cell that explains its purpose.</text:p>
            </text:list-item>
          </text:list>
        </text:list-item>
        <text:list-item>
          <text:p text:style-name="P2"><text:span text:style-name="Strong_20_Emphasis"><text:span text:style-name="T2">Notebook structure</text:span></text:span></text:p>
          <text:list>
            <text:list-item>
              <text:p text:style-name="P2">The notebook must be organized into <text:span text:style-name="Strong_20_Emphasis"><text:span text:style-name="T2">top‑level sections</text:span></text:span> (using Markdown headings like <text:span text:style-name="Source_20_Text"><text:span text:style-name="T2">#</text:span></text:span>, <text:span text:style-name="Source_20_Text"><text:span text:style-name="T2">##</text:span></text:span>, etc.).</text:p>
            </text:list-item>
            <text:list-item>
              <text:p text:style-name="P2">Choose the section headings based on the PRD (for example: “Introduction / Problem Overview”, “Data &amp; Assumptions”, “Feature Engineering”, “Modeling”, “Evaluation”, etc.), but adapt them to the actual requirements in the PRD rather than using a fixed template.</text:p>
            </text:list-item>
            <text:list-item>
              <text:p text:style-name="P2">Within each top‑level section, split the implementation into <text:span text:style-name="Strong_20_Emphasis"><text:span text:style-name="T2">logical sub‑steps</text:span></text:span> (subsections) that correspond to separate code cells.</text:p>
            </text:list-item>
            <text:list-item>
              <text:p text:style-name="P3">It is appreciated to start with Imports and User defined variables</text:p>
            </text:list-item>
          </text:list>
        </text:list-item>
        <text:list-item>
          <text:p text:style-name="P2"><text:span text:style-name="Strong_20_Emphasis"><text:span text:style-name="T2">Markdown and code cell pattern</text:span></text:span></text:p>
          <text:list>
            <text:list-item>
              <text:p text:style-name="P2">For every code cell you plan, first create a <text:span text:style-name="Strong_20_Emphasis"><text:span text:style-name="T2">Markdown cell describing what that code cell will do</text:span></text:span>.</text:p>
            </text:list-item>
            <text:list-item>
              <text:p text:style-name="P2">Then define a corresponding <text:span text:style-name="Strong_20_Emphasis"><text:span text:style-name="T2">code cell that is empty of any code</text:span></text:span>.</text:p>
            </text:list-item>
            <text:list-item>
              <text:p text:style-name="P2"><text:span text:style-name="Strong_20_Emphasis"><text:span text:style-name="T2">Always alternate Markdown and code cells</text:span></text:span>: Markdown description → empty code cell → next Markdown → next empty code cell → …</text:p>
            </text:list-item>
            <text:list-item>
              <text:p text:style-name="P2">Do <text:span text:style-name="Strong_20_Emphasis"><text:span text:style-name="T2">not</text:span></text:span> generate any code, pseudo‑code, or imports. Only describe code cells and their purpose.</text:p>
            </text:list-item>
          </text:list>
        </text:list-item>
        <text:list-item>
          <text:p text:style-name="P2"><text:span text:style-name="Strong_20_Emphasis"><text:span text:style-name="T2">Style of Markdown descriptions</text:span></text:span></text:p>
          <text:list>
            <text:list-item>
              <text:p text:style-name="P2">Use a <text:span text:style-name="Strong_20_Emphasis"><text:span text:style-name="T2">neutral, descriptive style</text:span></text:span> that is readable to a user and also serves as a clear instruction for later code implementation.</text:p>
            </text:list-item>
            <text:list-item>
              <text:p text:style-name="P2">Each Markdown cell should precisely explain:</text:p>
              <text:list>
                <text:list-item>
                  <text:p text:style-name="P2">what inputs it expects (e.g. which variables or data structures should already exist),</text:p>
                </text:list-item>
                <text:list-item>
                  <text:p text:style-name="P2">what transformations or logic will happen in the corresponding code cell,</text:p>
                </text:list-item>
                <text:list-item>
                  <text:p text:style-name="P2">what outputs or side‑effects it should produce (e.g. new columns, trained model, plots, saved artifacts).</text:p>
                </text:list-item>
              </text:list>
            </text:list-item>
            <text:list-item>
              <text:p text:style-name="P2">Where helpful, you may list bullet‑point tasks for the code cell (e.g. “Compute X”, “Validate Y”, “Raise an error if Z”).</text:p>
            </text:list-item>
          </text:list>
        </text:list-item>
        <text:list-item>
          <text:p text:style-name="P2"><text:soft-page-break/><text:span text:style-name="Strong_20_Emphasis"><text:span text:style-name="T2">Terminology and alignment with PRD</text:span></text:span></text:p>
          <text:list>
            <text:list-item>
              <text:p text:style-name="P2"><text:span text:style-name="Strong_20_Emphasis"><text:span text:style-name="T2">Reuse the terms, names, and concepts from the PRD</text:span></text:span> (e.g. dataset names, KPI names, model types, business metrics) in your headings and Markdown descriptions.</text:p>
            </text:list-item>
            <text:list-item>
              <text:p text:style-name="P2">Do not silently rename key concepts. If a name in the PRD seems unclear or ambiguous, mention that in the Markdown and propose a clearer name in parentheses, but keep the original name visible.</text:p>
            </text:list-item>
          </text:list>
        </text:list-item>
        <text:list-item>
          <text:p text:style-name="P2"><text:span text:style-name="Strong_20_Emphasis"><text:span text:style-name="T2">Numbering and organization</text:span></text:span></text:p>
          <text:list>
            <text:list-item>
              <text:p text:style-name="P2">Use <text:span text:style-name="Strong_20_Emphasis"><text:span text:style-name="T2">numbered headings</text:span></text:span> where it improves clarity, e.g.</text:p>
              <text:list>
                <text:list-item>
                  <text:p text:style-name="P2"><text:span text:style-name="Source_20_Text"><text:span text:style-name="T2"># 1. Introduction</text:span></text:span></text:p>
                </text:list-item>
                <text:list-item>
                  <text:p text:style-name="P2"><text:span text:style-name="Source_20_Text"><text:span text:style-name="T2">## 1.1 Data sources</text:span></text:span></text:p>
                </text:list-item>
                <text:list-item>
                  <text:p text:style-name="P2"><text:span text:style-name="Source_20_Text"><text:span text:style-name="T2">## 1.2 Assumptions</text:span></text:span></text:p>
                </text:list-item>
                <text:list-item>
                  <text:p text:style-name="P2"><text:span text:style-name="Source_20_Text"><text:span text:style-name="T2"># 2. Data Preparation</text:span></text:span></text:p>
                </text:list-item>
                <text:list-item>
                  <text:p text:style-name="P2"><text:span text:style-name="Source_20_Text"><text:span text:style-name="T2">## 2.1 Load raw data</text:span></text:span></text:p>
                </text:list-item>
                <text:list-item>
                  <text:p text:style-name="P2">etc.</text:p>
                </text:list-item>
              </text:list>
            </text:list-item>
            <text:list-item>
              <text:p text:style-name="P2">Numbering is optional but preferred when it makes the flow clearer.</text:p>
            </text:list-item>
          </text:list>
        </text:list-item>
        <text:list-item>
          <text:p text:style-name="P2"><text:span text:style-name="Strong_20_Emphasis"><text:span text:style-name="T2">No code whatsoever</text:span></text:span></text:p>
          <text:list>
            <text:list-item>
              <text:p text:style-name="P2"><text:span text:style-name="Strong_20_Emphasis"><text:span text:style-name="T2">Do not write any Python code</text:span></text:span> in this step, including imports like <text:span text:style-name="Source_20_Text"><text:span text:style-name="T2">import pandas as pd</text:span></text:span> or placeholder statements like <text:span text:style-name="Source_20_Text"><text:span text:style-name="T2">pass</text:span></text:span>.</text:p>
            </text:list-item>
            <text:list-item>
              <text:p text:style-name="P2">Code cells must be <text:span text:style-name="Strong_20_Emphasis"><text:span text:style-name="T2">present but empty</text:span></text:span>. Their purpose is described only in the preceding Markdown cell.</text:p>
            </text:list-item>
          </text:list>
        </text:list-item>
        <text:list-item>
          <text:p text:style-name="P2"><text:span text:style-name="Strong_20_Emphasis"><text:span text:style-name="T2">Output format (Jupyter Notebook)</text:span></text:span></text:p>
          <text:list>
            <text:list-item>
              <text:p text:style-name="P2">The expected output is a <text:span text:style-name="Strong_20_Emphasis"><text:span text:style-name="T2">Jupyter Notebook structure</text:span></text:span>, consisting of:</text:p>
              <text:list>
                <text:list-item>
                  <text:p text:style-name="P2"><text:span text:style-name="Strong_20_Emphasis"><text:span text:style-name="T2">Markdown cells</text:span></text:span>: fully written, final text (headings + detailed descriptions).</text:p>
                </text:list-item>
                <text:list-item>
                  <text:p text:style-name="P2"><text:span text:style-name="Strong_20_Emphasis"><text:span text:style-name="T2">Code cells</text:span></text:span>: present but <text:span text:style-name="Strong_20_Emphasis"><text:span text:style-name="T2">empty</text:span></text:span> (no code at all).</text:p>
                </text:list-item>
              </text:list>
            </text:list-item>
            <text:list-item>
              <text:p text:style-name="P2">When you present the plan, represent it as a <text:span text:style-name="Strong_20_Emphasis"><text:span text:style-name="T2">sequence of notebook cells in order</text:span></text:span>, clearly marking each cell type, for example:</text:p>
              <text:list>
                <text:list-item>
                  <text:p text:style-name="P2"><text:span text:style-name="Source_20_Text"><text:span text:style-name="T2">Markdown cell:</text:span></text:span> followed by the Markdown content.</text:p>
                </text:list-item>
                <text:list-item>
                  <text:p text:style-name="P2"><text:span text:style-name="Source_20_Text"><text:span text:style-name="T2">Code cell (empty):</text:span></text:span> to indicate a blank code cell.</text:p>
                </text:list-item>
              </text:list>
            </text:list-item>
            <text:list-item>
              <text:p text:style-name="P2">Ensure that the structure you define can be directly translated into a Jupyter Notebook file by creating cells in the same order and with the same Markdown content.</text:p>
            </text:list-item>
          </text:list>
        </text:list-item>
        <text:list-item>
          <text:p text:style-name="P2"><text:span text:style-name="Strong_20_Emphasis"><text:span text:style-name="T2">Coverage and ambiguities</text:span></text:span></text:p>
          <text:list>
            <text:list-item>
              <text:p text:style-name="P2">Ensure that the whole PRD is covered by this notebook structure.</text:p>
            </text:list-item>
            <text:list-item>
              <text:p text:style-name="P2"><text:soft-page-break/>If something in the PRD is ambiguous or under‑specified, add a Markdown note highlighting the open question and what the corresponding code cell is expected to do once clarified.</text:p>
            </text:list-item>
          </text:list>
        </text:list-item>
      </text:list>
      <text:p text:style-name="P1">Now, based on these rules, <text:span text:style-name="Strong_20_Emphasis"><text:span text:style-name="T2">analyze the <text:s/>PRD and produce only the notebook skeleton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2:14:42.578389600</meta:creation-date>
    <dc:date>2026-04-18T17:28:17.411256700</dc:date>
    <meta:editing-duration>PT8M58S</meta:editing-duration>
    <meta:editing-cycles>2</meta:editing-cycles>
    <meta:generator>LibreOffice/26.2.2.2$Windows_X86_64 LibreOffice_project/1f77d10d6938fd34972958f64b2bcfa54f8b1ba5</meta:generator>
    <meta:document-statistic meta:table-count="0" meta:image-count="0" meta:object-count="0" meta:page-count="3" meta:paragraph-count="49" meta:word-count="660" meta:character-count="3852" meta:non-whitespace-character-count="3286"/>
  </office:meta>
</office:document-meta>
</file>