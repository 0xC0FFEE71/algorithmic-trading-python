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6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7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8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9">
      <style:paragraph-properties fo:margin-left="0in" fo:margin-right="0in" fo:text-indent="0in" style:auto-text-indent="false" fo:padding="0in" fo:border="none"/>
    </style:style>
    <style:style style:name="P12" style:family="paragraph" style:parent-style-name="Preformatted_20_Text" style:list-style-name="L9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3" style:family="paragraph" style:parent-style-name="Preformatted_20_Text" style:list-style-name="L9">
      <style:paragraph-properties fo:margin-left="0in" fo:margin-right="0in" fo:text-indent="0in" style:auto-text-indent="false" fo:padding="0in" fo:border="none"/>
    </style:style>
    <style:style style:name="P14" style:family="paragraph" style:parent-style-name="Preformatted_20_Text" style:list-style-name="L9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2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2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1-set-up-the-notebook-and-configuration"/>1. Set up the notebook and configuration</text:h>
      <text:list text:style-name="L1">
        <text:list-item>
          <text:p text:style-name="P1">Add a short intro Markdown cell:</text:p>
          <text:list>
            <text:list-item>
              <text:p text:style-name="P1">Explain that this notebook:</text:p>
              <text:list>
                <text:list-item>
                  <text:p text:style-name="P1">loads the six standardized JSON metric files,</text:p>
                </text:list-item>
                <text:list-item>
                  <text:p text:style-name="P1">compares models on validation and test metrics,</text:p>
                </text:list-item>
                <text:list-item>
                  <text:p text:style-name="P1">decides which models (if any) deserve further tuning,</text:p>
                </text:list-item>
                <text:list-item>
                  <text:p text:style-name="P1">and, if they are already tuned, recommends one for production.</text:p>
                </text:list-item>
              </text:list>
            </text:list-item>
          </text:list>
        </text:list-item>
        <text:list-item>
          <text:p text:style-name="P1">Create a small configuration section:</text:p>
          <text:list>
            <text:list-item>
              <text:p text:style-name="P1">List the paths to all six JSON files (or a directory + glob pattern).</text:p>
            </text:list-item>
            <text:list-item>
              <text:p text:style-name="P1">Define:</text:p>
              <text:list>
                <text:list-item>
                  <text:p text:style-name="P1">which metric(s) you treat as <text:span text:style-name="Strong_20_Emphasis"><text:span text:style-name="T1">primary</text:span></text:span> (e.g. validation macro F1, test macro F1),</text:p>
                </text:list-item>
                <text:list-item>
                  <text:p text:style-name="P1">optional minimum thresholds (e.g. “buy/sell F1 must be &gt; X”).</text:p>
                </text:list-item>
              </text:list>
            </text:list-item>
          </text:list>
        </text:list-item>
      </text:list>
      <text:p text:style-name="Horizontal_20_Line"/>
      <text:h text:style-name="P2" text:outline-level="2"><text:bookmark text:name="2-load-all-json-metrics-into-a-single-table"/>2. Load all JSON metrics into a single table</text:h>
      <text:list text:style-name="L2">
        <text:list-item>
          <text:p text:style-name="P3">Load each JSON file into Python objects:</text:p>
          <text:list>
            <text:list-item>
              <text:p text:style-name="P3">Each file should contain fields like: <text:span text:style-name="Source_20_Text"><text:span text:style-name="T1">model_name</text:span></text:span>, <text:span text:style-name="Source_20_Text"><text:span text:style-name="T1">model_type</text:span></text:span>, <text:span text:style-name="Source_20_Text"><text:span text:style-name="T1">hyperparameters</text:span></text:span>, <text:span text:style-name="Source_20_Text"><text:span text:style-name="T1">data</text:span></text:span>, <text:span text:style-name="Source_20_Text"><text:span text:style-name="T1">metrics</text:span></text:span>, <text:span text:style-name="Source_20_Text"><text:span text:style-name="T1">baseline</text:span></text:span>, etc.</text:p>
            </text:list-item>
            <text:list-item>
              <text:p text:style-name="P3">Verify that the expected keys exist for all six files.</text:p>
            </text:list-item>
          </text:list>
        </text:list-item>
        <text:list-item>
          <text:p text:style-name="P3">Normalize into a Pandas DataFrame:</text:p>
          <text:list>
            <text:list-item>
              <text:p text:style-name="P3">For each model, extract <text:span text:style-name="Strong_20_Emphasis"><text:span text:style-name="T1">validation</text:span></text:span> and <text:span text:style-name="Strong_20_Emphasis"><text:span text:style-name="T1">test</text:span></text:span> values for:</text:p>
              <text:list>
                <text:list-item>
                  <text:p text:style-name="P3">macro F1,</text:p>
                </text:list-item>
                <text:list-item>
                  <text:p text:style-name="P3">weighted F1,</text:p>
                </text:list-item>
                <text:list-item>
                  <text:p text:style-name="P3">balanced accuracy,</text:p>
                </text:list-item>
                <text:list-item>
                  <text:p text:style-name="P3">per-class metrics for <text:span text:style-name="Source_20_Text"><text:span text:style-name="T1">buy</text:span></text:span>, <text:span text:style-name="Source_20_Text"><text:span text:style-name="T1">hold</text:span></text:span>, <text:span text:style-name="Source_20_Text"><text:span text:style-name="T1">sell</text:span></text:span> (e.g. F1/recall).</text:p>
                </text:list-item>
              </text:list>
            </text:list-item>
            <text:list-item>
              <text:p text:style-name="P3">Add columns for:</text:p>
              <text:list>
                <text:list-item>
                  <text:p text:style-name="P3"><text:span text:style-name="Source_20_Text"><text:span text:style-name="T1">model_name</text:span></text:span> (e.g. <text:span text:style-name="Source_20_Text"><text:span text:style-name="T1">"hist_gradient_boosting_baseline"</text:span></text:span>),</text:p>
                </text:list-item>
                <text:list-item>
                  <text:p text:style-name="P3"><text:span text:style-name="Source_20_Text"><text:span text:style-name="T1">model_type</text:span></text:span> (full sklearn class name),</text:p>
                </text:list-item>
                <text:list-item>
                  <text:p text:style-name="P3">any notes like <text:span text:style-name="Source_20_Text"><text:span text:style-name="T1">class_weight_strategy</text:span></text:span>, thresholds used, etc.</text:p>
                </text:list-item>
              </text:list>
            </text:list-item>
          </text:list>
        </text:list-item>
        <text:list-item>
          <text:p text:style-name="P3">You should end up with a compact “leaderboard” DataFrame, one row per model, several columns of metrics.</text:p>
        </text:list-item>
      </text:list>
      <text:p text:style-name="Horizontal_20_Line"><text:soft-page-break/></text:p>
      <text:h text:style-name="P2" text:outline-level="2"><text:bookmark text:name="3-basic-leaderboard-comparison"/>3. Basic leaderboard comparison</text:h>
      <text:list text:style-name="L3">
        <text:list-item>
          <text:p text:style-name="P4">Create a <text:span text:style-name="Strong_20_Emphasis"><text:span text:style-name="T1">summary table</text:span></text:span> for validation metrics:</text:p>
          <text:list>
            <text:list-item>
              <text:p text:style-name="P4">For each model, show:</text:p>
              <text:list>
                <text:list-item>
                  <text:p text:style-name="P4"><text:span text:style-name="Source_20_Text"><text:span text:style-name="T1">val_macro_f1</text:span></text:span>,</text:p>
                </text:list-item>
                <text:list-item>
                  <text:p text:style-name="P4"><text:span text:style-name="Source_20_Text"><text:span text:style-name="T1">val_weighted_f1</text:span></text:span>,</text:p>
                </text:list-item>
                <text:list-item>
                  <text:p text:style-name="P4"><text:span text:style-name="Source_20_Text"><text:span text:style-name="T1">val_balanced_accuracy</text:span></text:span>,</text:p>
                </text:list-item>
                <text:list-item>
                  <text:p text:style-name="P4"><text:span text:style-name="Source_20_Text"><text:span text:style-name="T1">val_f1_buy</text:span></text:span>, <text:span text:style-name="Source_20_Text"><text:span text:style-name="T1">val_f1_sell</text:span></text:span> (and optionally <text:span text:style-name="Source_20_Text"><text:span text:style-name="T1">val_f1_hold</text:span></text:span>).</text:p>
                </text:list-item>
              </text:list>
            </text:list-item>
          </text:list>
        </text:list-item>
        <text:list-item>
          <text:p text:style-name="P4">Do the same for test metrics:</text:p>
          <text:list>
            <text:list-item>
              <text:p text:style-name="P4"><text:span text:style-name="Source_20_Text"><text:span text:style-name="T1">test_macro_f1</text:span></text:span>,</text:p>
            </text:list-item>
            <text:list-item>
              <text:p text:style-name="P4"><text:span text:style-name="Source_20_Text"><text:span text:style-name="T1">test_weighted_f1</text:span></text:span>,</text:p>
            </text:list-item>
            <text:list-item>
              <text:p text:style-name="P4"><text:span text:style-name="Source_20_Text"><text:span text:style-name="T1">test_balanced_accuracy</text:span></text:span>,</text:p>
            </text:list-item>
            <text:list-item>
              <text:p text:style-name="P4"><text:span text:style-name="Source_20_Text"><text:span text:style-name="T1">test_f1_buy</text:span></text:span>, <text:span text:style-name="Source_20_Text"><text:span text:style-name="T1">test_f1_sell</text:span></text:span>.</text:p>
            </text:list-item>
          </text:list>
        </text:list-item>
        <text:list-item>
          <text:p text:style-name="P4">Rank the models:</text:p>
          <text:list>
            <text:list-item>
              <text:p text:style-name="P4">Sort by validation macro F1 (descending).</text:p>
            </text:list-item>
            <text:list-item>
              <text:p text:style-name="P4">Optionally also rank by test macro F1.</text:p>
            </text:list-item>
            <text:list-item>
              <text:p text:style-name="P4">Create columns like <text:span text:style-name="Source_20_Text"><text:span text:style-name="T1">rank_val_macro_f1</text:span></text:span>, <text:span text:style-name="Source_20_Text"><text:span text:style-name="T1">rank_test_macro_f1</text:span></text:span>.</text:p>
            </text:list-item>
          </text:list>
        </text:list-item>
        <text:list-item>
          <text:p text:style-name="P4">Add a Markdown cell interpreting the leaderboard:</text:p>
          <text:list>
            <text:list-item>
              <text:p text:style-name="P4">Note which models are clearly underperforming (e.g. much lower macro F1).</text:p>
            </text:list-item>
            <text:list-item>
              <text:p text:style-name="P4">Note if any models show good validation but poor test performance (overfitting risk).</text:p>
            </text:list-item>
            <text:list-item>
              <text:p text:style-name="P4">Highlight top 2–3 models that are both:</text:p>
              <text:list>
                <text:list-item>
                  <text:p text:style-name="P4">strong on validation metrics,</text:p>
                </text:list-item>
                <text:list-item>
                  <text:p text:style-name="P4">and not obviously collapsing on test metrics.</text:p>
                </text:list-item>
              </text:list>
            </text:list-item>
          </text:list>
        </text:list-item>
      </text:list>
      <text:p text:style-name="Horizontal_20_Line"/>
      <text:h text:style-name="P2" text:outline-level="2"><text:bookmark text:name="4-check-action-class-performance-buysell-focus"/>4. Check action-class performance (buy/sell focus)</text:h>
      <text:list text:style-name="L4">
        <text:list-item>
          <text:p text:style-name="P5">Extract and compare <text:span text:style-name="Strong_20_Emphasis"><text:span text:style-name="T1">class-wise F1/recall for buy and sell</text:span></text:span>:</text:p>
          <text:list>
            <text:list-item>
              <text:p text:style-name="P5">For each model, list:</text:p>
              <text:list>
                <text:list-item>
                  <text:p text:style-name="P5"><text:span text:style-name="Source_20_Text"><text:span text:style-name="T1">val_f1_buy</text:span></text:span>, <text:span text:style-name="Source_20_Text"><text:span text:style-name="T1">val_recall_buy</text:span></text:span>,</text:p>
                </text:list-item>
                <text:list-item>
                  <text:p text:style-name="P5"><text:span text:style-name="Source_20_Text"><text:span text:style-name="T1">val_f1_sell</text:span></text:span>, <text:span text:style-name="Source_20_Text"><text:span text:style-name="T1">val_recall_sell</text:span></text:span>,</text:p>
                </text:list-item>
                <text:list-item>
                  <text:p text:style-name="P5">and same for test.</text:p>
                </text:list-item>
              </text:list>
            </text:list-item>
          </text:list>
        </text:list-item>
        <text:list-item>
          <text:p text:style-name="P5"><text:soft-page-break/>Add a short interpretation:</text:p>
          <text:list>
            <text:list-item>
              <text:p text:style-name="P5">Emphasize that an apparently good overall macro F1 might hide poor buy/sell performance.</text:p>
            </text:list-item>
            <text:list-item>
              <text:p text:style-name="P5">Identify models where:</text:p>
              <text:list>
                <text:list-item>
                  <text:p text:style-name="P5">buy and sell classes have reasonable F1 on both validation and test,</text:p>
                </text:list-item>
                <text:list-item>
                  <text:p text:style-name="P5">vs. models that mostly predict hold.</text:p>
                </text:list-item>
              </text:list>
            </text:list-item>
          </text:list>
        </text:list-item>
        <text:list-item>
          <text:p text:style-name="P5">Decide a simple rule of thumb:</text:p>
          <text:list>
            <text:list-item>
              <text:p text:style-name="P5">Example: “Only consider models where both <text:span text:style-name="Source_20_Text"><text:span text:style-name="T1">test_f1_buy</text:span></text:span> and <text:span text:style-name="Source_20_Text"><text:span text:style-name="T1">test_f1_sell</text:span></text:span> exceed some minimal threshold (e.g. 0.2–0.3 to start).”</text:p>
            </text:list-item>
            <text:list-item>
              <text:p text:style-name="P5">Use this as a filter to narrow down candidates.</text:p>
            </text:list-item>
          </text:list>
        </text:list-item>
      </text:list>
      <text:p text:style-name="Horizontal_20_Line"/>
      <text:h text:style-name="P2" text:outline-level="2"><text:bookmark text:name="5-decide-further-finetuning-vs-production-candidat"/>5. Decide: further finetuning vs production candidate</text:h>
      <text:p text:style-name="P6">Here you explicitly encode your logic.</text:p>
      <text:list text:style-name="L5">
        <text:list-item>
          <text:p text:style-name="P7">For each model, define attributes:</text:p>
          <text:list>
            <text:list-item>
              <text:p text:style-name="P7"><text:span text:style-name="Source_20_Text"><text:span text:style-name="T1">is_baseline</text:span></text:span> (yes/no),</text:p>
            </text:list-item>
            <text:list-item>
              <text:p text:style-name="P7"><text:span text:style-name="Source_20_Text"><text:span text:style-name="T1">already_tuned</text:span></text:span> (yes/no, based on how you produced the JSON),</text:p>
            </text:list-item>
            <text:list-item>
              <text:p text:style-name="P7"><text:span text:style-name="Source_20_Text"><text:span text:style-name="T1">eligible_for_tuning</text:span></text:span> (yes/no, from the metric filters above).</text:p>
            </text:list-item>
          </text:list>
        </text:list-item>
        <text:list-item>
          <text:p text:style-name="P7">Based on the metrics:</text:p>
          <text:list>
            <text:list-item>
              <text:p text:style-name="P7">If <text:span text:style-name="Strong_20_Emphasis"><text:span text:style-name="T1">none</text:span></text:span> of the models clearly stand out:</text:p>
              <text:list>
                <text:list-item>
                  <text:p text:style-name="P7">Mark 2–3 with the best validation macro F1 and acceptable buy/sell F1 as <text:span text:style-name="Strong_20_Emphasis"><text:span text:style-name="T1">“tuning candidates”</text:span></text:span>.</text:p>
                </text:list-item>
              </text:list>
            </text:list-item>
            <text:list-item>
              <text:p text:style-name="P7">If <text:span text:style-name="Strong_20_Emphasis"><text:span text:style-name="T1">one model</text:span></text:span> is clearly superior in both validation and test metrics:</text:p>
              <text:list>
                <text:list-item>
                  <text:p text:style-name="P7">Flag it as <text:span text:style-name="Strong_20_Emphasis"><text:span text:style-name="T1">“production candidate”</text:span></text:span>,</text:p>
                </text:list-item>
                <text:list-item>
                  <text:p text:style-name="P7">but still consider light tuning as a sanity check.</text:p>
                </text:list-item>
              </text:list>
            </text:list-item>
          </text:list>
        </text:list-item>
        <text:list-item>
          <text:p text:style-name="P7">In Markdown, write an explicit decision:</text:p>
          <text:list>
            <text:list-item>
              <text:p text:style-name="P7">Example:</text:p>
              <text:list>
                <text:list-item>
                  <text:p text:style-name="P7">“HistGradientBoostingClassifier and ExtraTreesClassifier are selected for further tuning.”</text:p>
                </text:list-item>
                <text:list-item>
                  <text:p text:style-name="P7">or “HistGradientBoostingClassifier shows consistently best performance; treat current JSON as tuned and propose it for production.”</text:p>
                </text:list-item>
              </text:list>
            </text:list-item>
          </text:list>
        </text:list-item>
      </text:list>
      <text:p text:style-name="Horizontal_20_Line"/>
      <text:h text:style-name="P2" text:outline-level="2"><text:bookmark text:name="6-generate-concrete-tuning-recommendations"/><text:soft-page-break/>6. Generate concrete tuning recommendations</text:h>
      <text:list text:style-name="L6">
        <text:list-item>
          <text:p text:style-name="P8">For each <text:span text:style-name="Strong_20_Emphasis"><text:span text:style-name="T1">tuning candidate model</text:span></text:span>, create a small section that:</text:p>
          <text:list>
            <text:list-item>
              <text:p text:style-name="P8">Summarizes its current hyperparameters from the JSON.</text:p>
            </text:list-item>
            <text:list-item>
              <text:p text:style-name="P8">Notes any potential issues:</text:p>
              <text:list>
                <text:list-item>
                  <text:p text:style-name="P8">underfitting (both train and val metrics low),</text:p>
                </text:list-item>
                <text:list-item>
                  <text:p text:style-name="P8">overfitting (train much higher than val/test, if you logged it),</text:p>
                </text:list-item>
                <text:list-item>
                  <text:p text:style-name="P8">class imbalance problems (low buy/sell F1).</text:p>
                </text:list-item>
              </text:list>
            </text:list-item>
          </text:list>
        </text:list-item>
        <text:list-item>
          <text:p text:style-name="P8">Based on the model type, propose <text:span text:style-name="Strong_20_Emphasis"><text:span text:style-name="T1">targeted hyperparameter ranges</text:span></text:span>:</text:p>
          <text:list>
            <text:list-item>
              <text:p text:style-name="P8">For example:</text:p>
              <text:list>
                <text:list-item>
                  <text:p text:style-name="P8">RandomForest: <text:span text:style-name="Source_20_Text"><text:span text:style-name="T1">n_estimators</text:span></text:span>, <text:span text:style-name="Source_20_Text"><text:span text:style-name="T1">max_depth</text:span></text:span>, <text:span text:style-name="Source_20_Text"><text:span text:style-name="T1">min_samples_leaf</text:span></text:span>, <text:span text:style-name="Source_20_Text"><text:span text:style-name="T1">max_features</text:span></text:span>, <text:span text:style-name="Source_20_Text"><text:span text:style-name="T1">class_weight</text:span></text:span>.</text:p>
                </text:list-item>
                <text:list-item>
                  <text:p text:style-name="P8">HistGradientBoosting: <text:span text:style-name="Source_20_Text"><text:span text:style-name="T1">learning_rate</text:span></text:span>, <text:span text:style-name="Source_20_Text"><text:span text:style-name="T1">max_depth</text:span></text:span>/<text:span text:style-name="Source_20_Text"><text:span text:style-name="T1">max_leaf_nodes</text:span></text:span>, <text:span text:style-name="Source_20_Text"><text:span text:style-name="T1">max_iter</text:span></text:span>, <text:span text:style-name="Source_20_Text"><text:span text:style-name="T1">l2_regularization</text:span></text:span>, <text:span text:style-name="Source_20_Text"><text:span text:style-name="T1">min_samples_leaf</text:span></text:span>.</text:p>
                </text:list-item>
                <text:list-item>
                  <text:p text:style-name="P8">LogisticRegression: <text:span text:style-name="Source_20_Text"><text:span text:style-name="T1">C</text:span></text:span>, <text:span text:style-name="Source_20_Text"><text:span text:style-name="T1">penalty</text:span></text:span>, <text:span text:style-name="Source_20_Text"><text:span text:style-name="T1">class_weight</text:span></text:span>.</text:p>
                </text:list-item>
                <text:list-item>
                  <text:p text:style-name="P8">MLPClassifier: number of layers, hidden units, <text:span text:style-name="Source_20_Text"><text:span text:style-name="T1">alpha</text:span></text:span>, learning rate, early stopping.</text:p>
                </text:list-item>
              </text:list>
            </text:list-item>
          </text:list>
        </text:list-item>
        <text:list-item>
          <text:p text:style-name="P8">For each model, suggest:</text:p>
          <text:list>
            <text:list-item>
              <text:p text:style-name="P8">A small <text:span text:style-name="Strong_20_Emphasis"><text:span text:style-name="T1">search space</text:span></text:span> for a <text:span text:style-name="Source_20_Text"><text:span text:style-name="T1">RandomizedSearchCV</text:span></text:span> or <text:span text:style-name="Source_20_Text"><text:span text:style-name="T1">GridSearchCV</text:span></text:span>.</text:p>
            </text:list-item>
            <text:list-item>
              <text:p text:style-name="P8">A <text:span text:style-name="Strong_20_Emphasis"><text:span text:style-name="T1">time-series cross-validation</text:span></text:span> strategy (e.g. <text:span text:style-name="Source_20_Text"><text:span text:style-name="T1">TimeSeriesSplit(n_splits=4 or 5)</text:span></text:span> on train+validation).</text:p>
            </text:list-item>
          </text:list>
        </text:list-item>
        <text:list-item>
          <text:p text:style-name="P8">Document this clearly as a mini-spec:</text:p>
          <text:list>
            <text:list-item>
              <text:p text:style-name="P8">“In the tuning notebook, for HistGradientBoosting we will:</text:p>
              <text:list>
                <text:list-item>
                  <text:p text:style-name="P8">use TimeSeriesSplit with 4 folds on train+val,</text:p>
                </text:list-item>
                <text:list-item>
                  <text:p text:style-name="P8">search over X, Y, Z hyperparameters in ranges A–B,</text:p>
                </text:list-item>
                <text:list-item>
                  <text:p text:style-name="P8">use validation macro F1 as the scoring metric,</text:p>
                </text:list-item>
                <text:list-item>
                  <text:p text:style-name="P8">and keep the best set of hyperparameters.”</text:p>
                </text:list-item>
              </text:list>
            </text:list-item>
          </text:list>
        </text:list-item>
      </text:list>
      <text:p text:style-name="Horizontal_20_Line"/>
      <text:h text:style-name="P2" text:outline-level="2"><text:bookmark text:name="7-decide-if-jsons-represent-final-tuned-models"/>7. Decide if JSONs represent “final” tuned models</text:h>
      <text:list text:style-name="L7">
        <text:list-item>
          <text:p text:style-name="P9">Add a section that explicitly distinguishes:</text:p>
          <text:list>
            <text:list-item>
              <text:p text:style-name="P9"><text:span text:style-name="Strong_20_Emphasis"><text:span text:style-name="T1">Baseline JSONs</text:span></text:span>: created with default or lightly tuned models; these are <text:span text:style-name="Emphasis"><text:span text:style-name="T1">not</text:span></text:span> final.</text:p>
            </text:list-item>
            <text:list-item>
              <text:p text:style-name="P9"><text:soft-page-break/><text:span text:style-name="Strong_20_Emphasis"><text:span text:style-name="T1">Future tuned JSONs</text:span></text:span>: created after running a tuning notebook; these should be considered final candidates.</text:p>
            </text:list-item>
          </text:list>
        </text:list-item>
        <text:list-item>
          <text:p text:style-name="P9">Define rules:</text:p>
          <text:list>
            <text:list-item>
              <text:p text:style-name="P9">If JSON indicates a wide, systematic search and good performance:</text:p>
              <text:list>
                <text:list-item>
                  <text:p text:style-name="P9">treat as <text:span text:style-name="Emphasis"><text:span text:style-name="T1">tuned</text:span></text:span>.</text:p>
                </text:list-item>
              </text:list>
            </text:list-item>
            <text:list-item>
              <text:p text:style-name="P9">If not, or if performance is obviously improvable:</text:p>
              <text:list>
                <text:list-item>
                  <text:p text:style-name="P9">treat as <text:span text:style-name="Emphasis"><text:span text:style-name="T1">baseline</text:span></text:span>.</text:p>
                </text:list-item>
              </text:list>
            </text:list-item>
          </text:list>
        </text:list-item>
        <text:list-item>
          <text:p text:style-name="P9">In Markdown, state:</text:p>
          <text:list>
            <text:list-item>
              <text:p text:style-name="P9">For current state, “All six JSONs are baseline runs; this notebook’s job is to choose 1–2 models for further tuning in a dedicated tuning notebook.”</text:p>
            </text:list-item>
          </text:list>
        </text:list-item>
      </text:list>
      <text:p text:style-name="Horizontal_20_Line"/>
      <text:h text:style-name="P2" text:outline-level="2"><text:bookmark text:name="8-final-production-recommendation-logic"/>8. Final production recommendation logic</text:h>
      <text:list text:style-name="L8">
        <text:list-item>
          <text:p text:style-name="P10">Write down <text:span text:style-name="Strong_20_Emphasis"><text:span text:style-name="T1">production selection criteria</text:span></text:span> you will use once tuning is done:</text:p>
          <text:list>
            <text:list-item>
              <text:p text:style-name="P10">Example:</text:p>
              <text:list>
                <text:list-item>
                  <text:p text:style-name="P10">Highest <text:span text:style-name="Strong_20_Emphasis"><text:span text:style-name="T1">test macro F1</text:span></text:span>, subject to:</text:p>
                  <text:list>
                    <text:list-item>
                      <text:p text:style-name="P10"><text:span text:style-name="Source_20_Text"><text:span text:style-name="T1">test_f1_buy</text:span></text:span> and <text:span text:style-name="Source_20_Text"><text:span text:style-name="T1">test_f1_sell</text:span></text:span> ≥ a threshold,</text:p>
                    </text:list-item>
                    <text:list-item>
                      <text:p text:style-name="P10">stable performance between validation and test (no huge drop).</text:p>
                    </text:list-item>
                  </text:list>
                </text:list-item>
                <text:list-item>
                  <text:p text:style-name="P10">Secondary criteria:</text:p>
                  <text:list>
                    <text:list-item>
                      <text:p text:style-name="P10">Model simplicity / stability,</text:p>
                    </text:list-item>
                    <text:list-item>
                      <text:p text:style-name="P10">Training time and inference cos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Show how you would apply this rule to the current baseline results:</text:p>
          <text:list>
            <text:list-item>
              <text:p text:style-name="P10">Identify a “provisional production candidate” (e.g. whichever model is currently best).</text:p>
            </text:list-item>
            <text:list-item>
              <text:p text:style-name="P10">Note that its status is provisional until tuning is done.</text:p>
            </text:list-item>
          </text:list>
        </text:list-item>
      </text:list>
      <text:p text:style-name="Horizontal_20_Line"/>
      <text:h text:style-name="P2" text:outline-level="2"><text:bookmark text:name="9-outputs-of-this-comparison-notebook"/>9. Outputs of this comparison notebook</text:h>
      <text:list text:style-name="L9">
        <text:list-item>
          <text:p text:style-name="P11">Plan to save a <text:span text:style-name="Strong_20_Emphasis"><text:span text:style-name="T1">meta-results JSON</text:span></text:span> summarizing this model comparison:</text:p>
          <text:list>
            <text:list-item>
              <text:p text:style-name="P11">Structure example:</text:p>
              <text:p text:style-name="P12">text</text:p>
              <text:p text:style-name="P13"><text:span text:style-name="Source_20_Text"><text:span text:style-name="T1">comparison = {</text:span></text:span></text:p>
              <text:p text:style-name="P13"><text:span text:style-name="Source_20_Text"><text:span text:style-name="T1"><text:s text:c="4"/>"models": [ ... per-model metrics and ranks ... ],</text:span></text:span></text:p>
              <text:p text:style-name="P13"><text:span text:style-name="Source_20_Text"><text:span text:style-name="T1"><text:s text:c="4"/>"tuning_candidates": ["hist_gradient_boosting_baseline", "extra_trees_baseline"],</text:span></text:span></text:p>
              <text:p text:style-name="P13"><text:span text:style-name="Source_20_Text"><text:span text:style-name="T1"><text:s text:c="4"/>"provisional_production_candidate": "hist_gradient_boosting_baseline",</text:span></text:span></text:p>
              <text:p text:style-name="P13"><text:soft-page-break/><text:span text:style-name="Source_20_Text"><text:span text:style-name="T1"><text:s text:c="4"/>"selection_rules": {</text:span></text:span></text:p>
              <text:p text:style-name="P13"><text:span text:style-name="Source_20_Text"><text:span text:style-name="T1"><text:s text:c="8"/>"primary_metric": "test_macro_f1",</text:span></text:span></text:p>
              <text:p text:style-name="P13"><text:span text:style-name="Source_20_Text"><text:span text:style-name="T1"><text:s text:c="8"/>"min_f1_buy": 0.xx,</text:span></text:span></text:p>
              <text:p text:style-name="P13"><text:span text:style-name="Source_20_Text"><text:span text:style-name="T1"><text:s text:c="8"/>"min_f1_sell": 0.yy,</text:span></text:span></text:p>
              <text:p text:style-name="P13"><text:span text:style-name="Source_20_Text"><text:span text:style-name="T1"><text:s text:c="4"/>},</text:span></text:span></text:p>
              <text:p text:style-name="P13"><text:span text:style-name="Source_20_Text"><text:span text:style-name="T1"><text:s text:c="4"/>"notes": "All models currently baseline; tuning to follow."</text:span></text:span></text:p>
              <text:p text:style-name="P14"><text:span text:style-name="Source_20_Text"><text:span text:style-name="T1">}</text:span></text:span></text:p>
            </text:list-item>
          </text:list>
        </text:list-item>
        <text:list-item>
          <text:p text:style-name="P11">Save this comparison JSON under something like:</text:p>
          <text:list>
            <text:list-item>
              <text:p text:style-name="P11"><text:span text:style-name="Source_20_Text"><text:span text:style-name="T1">3_model_results/model_comparison_baselines.json</text:span></text:span>.</text:p>
            </text:list-item>
          </text:list>
        </text:list-item>
        <text:list-item>
          <text:p text:style-name="P11">This file will then be used by your <text:span text:style-name="Strong_20_Emphasis"><text:span text:style-name="T1">tuning notebook</text:span></text:span> and by future production decision logic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17:21:49.554211300</meta:creation-date>
    <dc:date>2026-04-26T18:25:57.938874500</dc:date>
    <meta:editing-duration>PT53M56S</meta:editing-duration>
    <meta:editing-cycles>1</meta:editing-cycles>
    <meta:document-statistic meta:table-count="0" meta:image-count="0" meta:object-count="0" meta:page-count="6" meta:paragraph-count="143" meta:word-count="1064" meta:character-count="6799" meta:non-whitespace-character-count="5965"/>
    <meta:generator>LibreOffice/26.2.2.2$Windows_X86_64 LibreOffice_project/1f77d10d6938fd34972958f64b2bcfa54f8b1ba5</meta:generator>
  </office:meta>
</office:document-meta>
</file>