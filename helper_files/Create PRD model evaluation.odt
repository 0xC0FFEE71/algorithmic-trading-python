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2" style:family="paragraph" style:parent-style-name="Heading_20_2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 style:list-style-name="L4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5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 style:list-style-name="L6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7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8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 style:list-style-name="L9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 style:list-style-name="L10">
      <style:paragraph-properties fo:margin-left="0in" fo:margin-right="0in" fo:text-indent="0in" style:auto-text-indent="false" fo:padding="0in" fo:border="none"/>
    </style:style>
    <style:style style:name="P13" style:family="paragraph" style:parent-style-name="Text_20_body" style:list-style-name="L11">
      <style:paragraph-properties fo:margin-left="0in" fo:margin-right="0in" fo:text-indent="0in" style:auto-text-indent="false" fo:padding="0in" fo:border="none"/>
    </style:style>
    <style:style style:name="P14" style:family="paragraph" style:parent-style-name="Text_20_body" style:list-style-name="L12">
      <style:paragraph-properties fo:margin-left="0in" fo:margin-right="0in" fo:text-indent="0in" style:auto-text-indent="false" fo:padding="0in" fo:border="none"/>
    </style:style>
    <style:style style:name="P15" style:family="paragraph" style:parent-style-name="Text_20_body" style:list-style-name="L12">
      <style:paragraph-properties fo:margin-left="0in" fo:margin-right="0in" fo:text-indent="0in" style:auto-text-indent="false" fo:padding="0in" fo:border="none"/>
      <style:text-properties officeooo:paragraph-rsid="001952f7"/>
    </style:style>
    <style:style style:name="P16" style:family="paragraph" style:parent-style-name="Text_20_body" style:list-style-name="L13">
      <style:paragraph-properties fo:margin-left="0in" fo:margin-right="0in" fo:text-indent="0in" style:auto-text-indent="false" fo:padding="0in" fo:border="none"/>
    </style:style>
    <style:style style:name="P17" style:family="paragraph" style:parent-style-name="Text_20_body" style:list-style-name="L14">
      <style:paragraph-properties fo:margin-left="0in" fo:margin-right="0in" fo:text-indent="0in" style:auto-text-indent="false" fo:padding="0in" fo:border="none"/>
    </style:style>
    <style:style style:name="P18" style:family="paragraph" style:parent-style-name="Text_20_body" style:list-style-name="L15">
      <style:paragraph-properties fo:margin-left="0in" fo:margin-right="0in" fo:text-indent="0in" style:auto-text-indent="false" fo:padding="0in" fo:border="none"/>
    </style:style>
    <style:style style:name="P19" style:family="paragraph" style:parent-style-name="Text_20_body" style:list-style-name="L16">
      <style:paragraph-properties fo:margin-left="0in" fo:margin-right="0in" fo:text-indent="0in" style:auto-text-indent="false" fo:padding="0in" fo:border="none"/>
    </style:style>
    <style:style style:name="P20" style:family="paragraph" style:parent-style-name="Text_20_body" style:list-style-name="L17">
      <style:paragraph-properties fo:margin-left="0in" fo:margin-right="0in" fo:text-indent="0in" style:auto-text-indent="false" fo:padding="0in" fo:border="none"/>
    </style:style>
    <style:style style:name="P21" style:family="paragraph" style:parent-style-name="Text_20_body" style:list-style-name="L18">
      <style:paragraph-properties fo:margin-left="0.3937in" fo:margin-right="0.3937in" fo:text-indent="0in" style:auto-text-indent="false" fo:padding="0in" fo:border="none"/>
    </style:style>
    <style:style style:name="P22" style:family="paragraph" style:parent-style-name="Text_20_body" style:list-style-name="L18">
      <style:paragraph-properties fo:margin-left="0.3937in" fo:margin-right="0.3937in" fo:margin-top="0in" fo:margin-bottom="0in" style:contextual-spacing="false" fo:text-indent="0in" style:auto-text-indent="false" fo:padding="0in" fo:border="none"/>
    </style:style>
    <style:style style:name="P23" style:family="paragraph" style:parent-style-name="Text_20_body" style:list-style-name="L19">
      <style:paragraph-properties fo:margin-left="0in" fo:margin-right="0in" fo:text-indent="0in" style:auto-text-indent="false" fo:padding="0in" fo:border="none"/>
    </style:style>
    <style:style style:name="P24" style:family="paragraph" style:parent-style-name="Text_20_body" style:list-style-name="L20">
      <style:paragraph-properties fo:margin-left="0in" fo:margin-right="0in" fo:text-indent="0in" style:auto-text-indent="false" fo:padding="0in" fo:border="none"/>
    </style:style>
    <style:style style:name="P25" style:family="paragraph" style:parent-style-name="Text_20_body" style:list-style-name="L21">
      <style:paragraph-properties fo:margin-left="0in" fo:margin-right="0in" fo:text-indent="0in" style:auto-text-indent="false" fo:padding="0in" fo:border="none"/>
    </style:style>
    <style:style style:name="P26" style:family="paragraph" style:parent-style-name="Text_20_body" style:list-style-name="L22">
      <style:paragraph-properties fo:margin-left="0in" fo:margin-right="0in" fo:text-indent="0in" style:auto-text-indent="false" fo:padding="0in" fo:border="none"/>
    </style:style>
    <style:style style:name="P27" style:family="paragraph" style:parent-style-name="Text_20_body" style:list-style-name="L23">
      <style:paragraph-properties fo:margin-left="0in" fo:margin-right="0in" fo:text-indent="0in" style:auto-text-indent="false" fo:padding="0in" fo:border="none"/>
    </style:style>
    <style:style style:name="P28" style:family="paragraph" style:parent-style-name="Text_20_body" style:list-style-name="L24">
      <style:paragraph-properties fo:margin-left="0in" fo:margin-right="0in" fo:text-indent="0in" style:auto-text-indent="false" fo:padding="0in" fo:border="none"/>
    </style:style>
    <style:style style:name="P29" style:family="paragraph" style:parent-style-name="Text_20_body" style:list-style-name="L25">
      <style:paragraph-properties fo:margin-left="0in" fo:margin-right="0in" fo:text-indent="0in" style:auto-text-indent="false" fo:padding="0in" fo:border="none"/>
    </style:style>
    <style:style style:name="P30" style:family="paragraph" style:parent-style-name="Text_20_body" style:list-style-name="L26">
      <style:paragraph-properties fo:margin-left="0in" fo:margin-right="0in" fo:text-indent="0in" style:auto-text-indent="false" fo:padding="0in" fo:border="none"/>
    </style:style>
    <style:style style:name="P31" style:family="paragraph" style:parent-style-name="Text_20_body" style:list-style-name="L27">
      <style:paragraph-properties fo:margin-left="0in" fo:margin-right="0in" fo:text-indent="0in" style:auto-text-indent="false" fo:padding="0in" fo:border="none"/>
    </style:style>
    <style:style style:name="P32" style:family="paragraph" style:parent-style-name="Text_20_body" style:list-style-name="L28">
      <style:paragraph-properties fo:margin-left="0in" fo:margin-right="0in" fo:text-indent="0in" style:auto-text-indent="false" fo:padding="0in" fo:border="none"/>
    </style:style>
    <style:style style:name="P33" style:family="paragraph" style:parent-style-name="Text_20_body" style:list-style-name="L29">
      <style:paragraph-properties fo:margin-left="0in" fo:margin-right="0in" fo:text-indent="0in" style:auto-text-indent="false" fo:padding="0in" fo:border="none"/>
    </style:style>
    <style:style style:name="P34" style:family="paragraph" style:parent-style-name="Text_20_body" style:list-style-name="L30">
      <style:paragraph-properties fo:margin-left="0in" fo:margin-right="0in" fo:text-indent="0in" style:auto-text-indent="false" fo:padding="0in" fo:border="none"/>
    </style:style>
    <style:style style:name="P35" style:family="paragraph" style:parent-style-name="Text_20_body" style:list-style-name="L31">
      <style:paragraph-properties fo:margin-left="0in" fo:margin-right="0in" fo:text-indent="0in" style:auto-text-indent="false" fo:padding="0in" fo:border="none"/>
    </style:style>
    <style:style style:name="P36" style:family="paragraph" style:parent-style-name="Text_20_body" style:list-style-name="L32">
      <style:paragraph-properties fo:margin-left="0in" fo:margin-right="0in" fo:text-indent="0in" style:auto-text-indent="false" fo:padding="0in" fo:border="none"/>
    </style:style>
    <style:style style:name="P37" style:family="paragraph" style:parent-style-name="Text_20_body" style:list-style-name="L33">
      <style:paragraph-properties fo:margin-left="0in" fo:margin-right="0in" fo:text-indent="0in" style:auto-text-indent="false" fo:padding="0in" fo:border="none"/>
    </style:style>
    <style:style style:name="T1" style:family="text">
      <style:text-properties officeooo:rsid="00180f2a" loext:padding="0in" loext:border="none"/>
    </style:style>
    <style:style style:name="T2" style:family="text">
      <style:text-properties loext:padding="0in" loext:border="none"/>
    </style:style>
    <style:style style:name="T3" style:family="text">
      <style:text-properties officeooo:rsid="00180f2a"/>
    </style:style>
    <style:style style:name="T4" style:family="text">
      <style:text-properties officeooo:rsid="0018c86b"/>
    </style:style>
    <style:style style:name="T5" style:family="text">
      <style:text-properties officeooo:rsid="001952f7"/>
    </style:style>
    <style:style style:name="T6" style:family="text">
      <style:text-properties officeooo:rsid="001952f7" loext:padding="0in" loext:border="none"/>
    </style:style>
    <style:style style:name="T7" style:family="text">
      <style:text-properties officeooo:rsid="001b161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1-experiment-overview-and-objectives"/>1. overview and objectives</text:h>
      <text:list text:style-name="L1">
        <text:list-item>
          <text:p text:style-name="P1"><text:span text:style-name="Strong_20_Emphasis"><text:span text:style-name="T1">G</text:span></text:span><text:span text:style-name="Strong_20_Emphasis"><text:span text:style-name="T2">oal of the </text:span></text:span><text:span text:style-name="Strong_20_Emphasis"><text:span text:style-name="T1">(Jupyter) </text:span></text:span><text:span text:style-name="Strong_20_Emphasis"><text:span text:style-name="T2">notebook/</text:span></text:span><text:span text:style-name="Strong_20_Emphasis"><text:span text:style-name="T1">program</text:span></text:span><text:span text:style-name="Strong_20_Emphasis"><text:span text:style-name="T2">.</text:span></text:span><text:line-break/><text:span text:style-name="T3">I</text:span> want to build and compare several machine learning models to predict the <text:span text:style-name="Strong_20_Emphasis"><text:span text:style-name="T2">1‑month direction</text:span></text:span> of stock prices (buy / hold / sell) using engineered features derived from daily OHLCV data for many symbols over the last 6 years.</text:p>
        </text:list-item>
        <text:list-item>
          <text:p text:style-name="P1"><text:span text:style-name="Strong_20_Emphasis"><text:span text:style-name="T1">P</text:span></text:span><text:span text:style-name="Strong_20_Emphasis"><text:span text:style-name="T2">rediction target.</text:span></text:span><text:line-break/><text:span text:style-name="T3">T</text:span>he model will predict a 3-class label (<text:span text:style-name="Source_20_Text"><text:span text:style-name="T2">buy</text:span></text:span>, <text:span text:style-name="Source_20_Text"><text:span text:style-name="T2">hold/wait</text:span></text:span>, <text:span text:style-name="Source_20_Text"><text:span text:style-name="T2">sell</text:span></text:span>) based on features computed from past prices and volumes, where the label is defined from the <text:span text:style-name="Strong_20_Emphasis"><text:span text:style-name="T2">forward 20‑trading‑day return</text:span></text:span>.</text:p>
        </text:list-item>
        <text:list-item>
          <text:p text:style-name="P1"><text:span text:style-name="Strong_20_Emphasis"><text:span text:style-name="T2">key design decisions.</text:span></text:span></text:p>
          <text:list>
            <text:list-item>
              <text:p text:style-name="P1">Use of <text:span text:style-name="Strong_20_Emphasis"><text:span text:style-name="T2">last 6 years</text:span></text:span> of data (rolling window)</text:p>
            </text:list-item>
            <text:list-item>
              <text:p text:style-name="P1"><text:span text:style-name="Strong_20_Emphasis"><text:span text:style-name="T2">Time-aware splits</text:span></text:span> (no shuffling)</text:p>
            </text:list-item>
            <text:list-item>
              <text:p text:style-name="P1">Pooled data across a broad index universe, filtered for data quality</text:p>
            </text:list-item>
            <text:list-item>
              <text:p text:style-name="P1">Benchmark models: Logistic Regression, Random Forest, Extra Trees, HistGradientBoosting</text:p>
            </text:list-item>
            <text:list-item>
              <text:p text:style-name="P1">Primary metric: <text:span text:style-name="Strong_20_Emphasis"><text:span text:style-name="T2">macro F1</text:span></text:span> and class-wise performance for buy/sell</text:p>
            </text:list-item>
          </text:list>
        </text:list-item>
      </text:list>
      <text:p text:style-name="Horizontal_20_Line"/>
      <text:h text:style-name="P2" text:outline-level="2"><text:bookmark text:name="2-data-sources-universe-and-time-horizon"/>2. Data sources, universe, and time horizon</text:h>
      <text:h text:style-name="P2" text:outline-level="2"><text:bookmark text:name="21-universe-definition"/>2.1 Universe definition</text:h>
      <text:list text:style-name="L2">
        <text:list-item>
          <text:p text:style-name="P3">We use all stocks in the S&amp;P 500 (or STOXX 600) that meet minimum data quality and liquidity criteria. <text:span text:style-name="T4">A list of stocks (symbols) is loaded via CSV file. </text:span></text:p>
        </text:list-item>
        <text:list-item>
          <text:p text:style-name="P3"><text:span text:style-name="Strong_20_Emphasis"><text:span text:style-name="T2">Define inclusion criteria.</text:span></text:span></text:p>
          <text:list>
            <text:list-item>
              <text:p text:style-name="P3">At least <text:span text:style-name="Strong_20_Emphasis"><text:span text:style-name="T2">3–5 years</text:span></text:span> of continuous history within the 6-year window</text:p>
            </text:list-item>
            <text:list-item>
              <text:p text:style-name="P3">Sufficient median daily volume</text:p>
            </text:list-item>
            <text:list-item>
              <text:p text:style-name="P3">No extreme data gaps or obvious price anomalies</text:p>
            </text:list-item>
          </text:list>
        </text:list-item>
        <text:list-item>
          <text:p text:style-name="P3">Note that this gives the model more cross-sectional examples and supports better generalization.</text:p>
        </text:list-item>
      </text:list>
      <text:h text:style-name="P2" text:outline-level="2"><text:bookmark text:name="22-time-window-selection-last-6-years"/>2.2 Time window selection (last 6 years)</text:h>
      <text:list text:style-name="L3">
        <text:list-item>
          <text:p text:style-name="P4"><text:span text:style-name="Strong_20_Emphasis"><text:span text:style-name="T2">State the date range you will use.</text:span></text:span><text:line-break/>Example: from <text:span text:style-name="Source_20_Text"><text:span text:style-name="T2">start_date = today - 6 years</text:span></text:span> to <text:span text:style-name="Source_20_Text"><text:span text:style-name="T2">end_date = most recent trading day</text:span></text:span>.</text:p>
        </text:list-item>
        <text:list-item>
          <text:p text:style-name="P4">6 years is long enough to cover multiple regimes while staying relevant to current market behavior, avoiding very old data that might reduce relevance.</text:p>
        </text:list-item>
      </text:list>
      <text:p text:style-name="Horizontal_20_Line"><text:soft-page-break/></text:p>
      <text:h text:style-name="P2" text:outline-level="2"><text:bookmark text:name="3-raw-data-format-and-loading"/>3. Raw data format and loading</text:h>
      <text:h text:style-name="P2" text:outline-level="2"><text:bookmark text:name="31-assumed-raw-data-schema"/>3.1 <text:span text:style-name="T4">R</text:span>aw data schema</text:h>
      <text:list text:style-name="L4">
        <text:list-item>
          <text:list>
            <text:list-item>
              <text:p text:style-name="P5"><text:span text:style-name="Source_20_Text"><text:span text:style-name="T2">date</text:span></text:span></text:p>
            </text:list-item>
            <text:list-item>
              <text:p text:style-name="P5"><text:span text:style-name="Source_20_Text"><text:span text:style-name="T2">open</text:span></text:span></text:p>
            </text:list-item>
            <text:list-item>
              <text:p text:style-name="P5"><text:span text:style-name="Source_20_Text"><text:span text:style-name="T2">high</text:span></text:span></text:p>
            </text:list-item>
            <text:list-item>
              <text:p text:style-name="P5"><text:span text:style-name="Source_20_Text"><text:span text:style-name="T2">low</text:span></text:span></text:p>
            </text:list-item>
            <text:list-item>
              <text:p text:style-name="P5"><text:span text:style-name="Source_20_Text"><text:span text:style-name="T2">close</text:span></text:span></text:p>
            </text:list-item>
            <text:list-item>
              <text:p text:style-name="P5"><text:span text:style-name="Source_20_Text"><text:span text:style-name="T2">adj_close</text:span></text:span></text:p>
            </text:list-item>
            <text:list-item>
              <text:p text:style-name="P5"><text:span text:style-name="Source_20_Text"><text:span text:style-name="T2">volume</text:span></text:span></text:p>
            </text:list-item>
          </text:list>
        </text:list-item>
        <text:list-item>
          <text:p text:style-name="P5"><text:span text:style-name="Strong_20_Emphasis"><text:span text:style-name="T2">storage format</text:span></text:span><text:line-break/>one <text:span text:style-name="T4">CSV</text:span> file per symbol. <text:span text:style-name="T4">The symbol is the file name (e. g. ‘AMZN.US.csv’, ‘TSLA.US.csv’)</text:span></text:p>
        </text:list-item>
      </text:list>
      <text:h text:style-name="P2" text:outline-level="2"><text:bookmark text:name="32-data-loading-plan"/>3.2 Data loading plan</text:h>
      <text:list text:style-name="L5">
        <text:list-item>
          <text:p text:style-name="P6"><text:span text:style-name="Strong_20_Emphasis"><text:span text:style-name="T2">Describe how to load all symbols into memory.</text:span></text:span></text:p>
          <text:list>
            <text:list-item>
              <text:p text:style-name="P6">read all relevant files</text:p>
            </text:list-item>
            <text:list-item>
              <text:p text:style-name="P6">Concatenate into a single DataFrame with a<text:span text:style-name="T4">n additonal</text:span> <text:span text:style-name="Source_20_Text"><text:span text:style-name="T2">symbol</text:span></text:span> column</text:p>
            </text:list-item>
            <text:list-item>
              <text:p text:style-name="P6">Ensure <text:span text:style-name="Source_20_Text"><text:span text:style-name="T2">date</text:span></text:span> is parsed as datetime and used as an index or column</text:p>
            </text:list-item>
          </text:list>
        </text:list-item>
        <text:list-item>
          <text:p text:style-name="P6"><text:span text:style-name="Strong_20_Emphasis"><text:span text:style-name="T2">basic checks.</text:span></text:span></text:p>
          <text:list>
            <text:list-item>
              <text:p text:style-name="P6">Inspect missing values, duplicates, out-of-order dates</text:p>
            </text:list-item>
            <text:list-item>
              <text:p text:style-name="P6">Ensure all prices and volumes are non-negative and in plausible ranges</text:p>
            </text:list-item>
          </text:list>
        </text:list-item>
      </text:list>
      <text:p text:style-name="Horizontal_20_Line"/>
      <text:h text:style-name="P2" text:outline-level="2"><text:bookmark text:name="4-data-cleaning-and-universe-filtering"/>4. Data cleaning and universe filtering</text:h>
      <text:h text:style-name="P2" text:outline-level="2"><text:bookmark text:name="41-cleaning-steps"/>4.1 Cleaning steps</text:h>
      <text:list text:style-name="L6">
        <text:list-item>
          <text:p text:style-name="P7"><text:span text:style-name="Strong_20_Emphasis"><text:span text:style-name="T2">basic cleaning tasks.</text:span></text:span></text:p>
          <text:list>
            <text:list-item>
              <text:p text:style-name="P7">Sort data by <text:span text:style-name="Source_20_Text"><text:span text:style-name="T2">symbol</text:span></text:span> and <text:span text:style-name="Source_20_Text"><text:span text:style-name="T2">date</text:span></text:span></text:p>
            </text:list-item>
            <text:list-item>
              <text:p text:style-name="P7">Forward-fill or drop missing values as appropriate</text:p>
            </text:list-item>
            <text:list-item>
              <text:p text:style-name="P7"><text:soft-page-break/>Remove days with obviously broken data (e.g. zero prices for non-halted stocks)</text:p>
            </text:list-item>
          </text:list>
        </text:list-item>
        <text:list-item>
          <text:p text:style-name="P7"><text:span text:style-name="Strong_20_Emphasis"><text:span text:style-name="T2">missing data policy.</text:span></text:span></text:p>
          <text:list>
            <text:list-item>
              <text:p text:style-name="P7"><text:span text:style-name="T5">Do not </text:span>drop rows with missing features <text:span text:style-name="T5">but</text:span> apply simple imputation</text:p>
            </text:list-item>
            <text:list-item>
              <text:p text:style-name="P7"><text:span text:style-name="T5">however, apply s</text:span>ymbol-level exclusions due to excessive missingness</text:p>
            </text:list-item>
          </text:list>
        </text:list-item>
      </text:list>
      <text:h text:style-name="P2" text:outline-level="2"><text:bookmark text:name="42-universe-filter-application"/>4.2 Universe filter application</text:h>
      <text:list text:style-name="L7">
        <text:list-item>
          <text:p text:style-name="P8"><text:span text:style-name="Strong_20_Emphasis"><text:span text:style-name="T2">enforce <text:s/>universe rules.</text:span></text:span></text:p>
          <text:list>
            <text:list-item>
              <text:p text:style-name="P8">For each symbol, check number of valid data points in the 6-year window</text:p>
            </text:list-item>
            <text:list-item>
              <text:p text:style-name="P8">Check median daily volume threshold</text:p>
            </text:list-item>
            <text:list-item>
              <text:p text:style-name="P8">Drop symbols that fail these checks</text:p>
            </text:list-item>
          </text:list>
        </text:list-item>
        <text:list-item>
          <text:p text:style-name="P8"><text:span text:style-name="Strong_20_Emphasis"><text:span text:style-name="T2">Summarize the final universe.</text:span></text:span></text:p>
          <text:list>
            <text:list-item>
              <text:p text:style-name="P8">Report how many symbols remain</text:p>
            </text:list-item>
            <text:list-item>
              <text:p text:style-name="P8">Report approximate number of rows in the pooled dataset</text:p>
            </text:list-item>
          </text:list>
        </text:list-item>
      </text:list>
      <text:p text:style-name="Horizontal_20_Line"/>
      <text:h text:style-name="P2" text:outline-level="2"><text:bookmark text:name="5-feature-engineering-per-symbol-then-pooled"/>5. Feature engineering (per symbol, then pooled)</text:h>
      <text:p text:style-name="P9"><text:span text:style-name="T5">A</text:span>ll features are computed <text:span text:style-name="Strong_20_Emphasis"><text:span text:style-name="T2">per symbol</text:span></text:span> on the time series, then concatenated into one multi-symbol dataset.</text:p>
      <text:h text:style-name="P2" text:outline-level="2"><text:bookmark text:name="51-base-return-and-range-features"/>5.1 Base return and range features</text:h>
      <text:list text:style-name="L8">
        <text:list-item>
          <text:p text:style-name="P10"><text:span text:style-name="Strong_20_Emphasis"><text:span text:style-name="T2">Daily returns.</text:span></text:span></text:p>
          <text:list>
            <text:list-item>
              <text:p text:style-name="P10"><text:span text:style-name="Source_20_Text"><text:span text:style-name="T2">ret_1d</text:span></text:span>: simple daily return from <text:span text:style-name="Source_20_Text"><text:span text:style-name="T2">close</text:span></text:span></text:p>
            </text:list-item>
            <text:list-item>
              <text:p text:style-name="P10"><text:span text:style-name="Source_20_Text"><text:span text:style-name="T2">log_ret_1d</text:span></text:span>: log return</text:p>
            </text:list-item>
          </text:list>
        </text:list-item>
        <text:list-item>
          <text:p text:style-name="P10"><text:span text:style-name="Strong_20_Emphasis"><text:span text:style-name="T2">Ranges.</text:span></text:span></text:p>
          <text:list>
            <text:list-item>
              <text:p text:style-name="P10"><text:span text:style-name="Source_20_Text"><text:span text:style-name="T2">tr_range</text:span></text:span>: <text:span text:style-name="Source_20_Text"><text:span text:style-name="T2">high - low</text:span></text:span></text:p>
            </text:list-item>
            <text:list-item>
              <text:p text:style-name="P10"><text:span text:style-name="Source_20_Text"><text:span text:style-name="T2">true_range</text:span></text:span>: max of range and gaps vs previous close (for volatility)</text:p>
            </text:list-item>
          </text:list>
        </text:list-item>
      </text:list>
      <text:h text:style-name="P2" text:outline-level="2"><text:bookmark text:name="52-multi-horizon-return-features"/>5.2 Multi-horizon return features</text:h>
      <text:list text:style-name="L9">
        <text:list-item>
          <text:p text:style-name="P11"><text:span text:style-name="Strong_20_Emphasis"><text:span text:style-name="T2">Short and medium horizon returns.</text:span></text:span></text:p>
          <text:list>
            <text:list-item>
              <text:p text:style-name="P11"><text:span text:style-name="Source_20_Text"><text:span text:style-name="T2">ret_5d</text:span></text:span>, <text:span text:style-name="Source_20_Text"><text:span text:style-name="T2">ret_10d</text:span></text:span>, <text:span text:style-name="Source_20_Text"><text:span text:style-name="T2">ret_20d</text:span></text:span>, <text:span text:style-name="Source_20_Text"><text:span text:style-name="T2">ret_</text:span></text:span><text:span text:style-name="Source_20_Text"><text:span text:style-name="T6">6</text:span></text:span><text:span text:style-name="Source_20_Text"><text:span text:style-name="T2">0d</text:span></text:span></text:p>
            </text:list-item>
            <text:list-item>
              <text:p text:style-name="P11"><text:span text:style-name="Source_20_Text"><text:span text:style-name="T2">log_ret_5d</text:span></text:span>, <text:span text:style-name="Source_20_Text"><text:span text:style-name="T2">log_ret_20d</text:span></text:span></text:p>
            </text:list-item>
          </text:list>
        </text:list-item>
        <text:list-item>
          <text:p text:style-name="P11"><text:span text:style-name="Strong_20_Emphasis"><text:span text:style-name="T2">Design note.</text:span></text:span><text:line-break/>these capture momentum at different horizons and are key predictors for a 1‑month label.</text:p>
        </text:list-item>
      </text:list>
      <text:h text:style-name="P2" text:outline-level="2"><text:bookmark text:name="53-trend-features-moving-averages--relative-positi"/><text:soft-page-break/>5.3 Trend features (moving averages &amp; relative position)</text:h>
      <text:list text:style-name="L10">
        <text:list-item>
          <text:p text:style-name="P12"><text:span text:style-name="Strong_20_Emphasis"><text:span text:style-name="T2">Moving averages.</text:span></text:span></text:p>
          <text:list>
            <text:list-item>
              <text:p text:style-name="P12"><text:span text:style-name="Source_20_Text"><text:span text:style-name="T2">sma_5</text:span></text:span>, <text:span text:style-name="Source_20_Text"><text:span text:style-name="T2">sma_20</text:span></text:span>, <text:span text:style-name="Source_20_Text"><text:span text:style-name="T2">sma_50</text:span></text:span>, <text:span text:style-name="Source_20_Text"><text:span text:style-name="T2">sma_200</text:span></text:span> on <text:span text:style-name="Source_20_Text"><text:span text:style-name="T2">close</text:span></text:span></text:p>
            </text:list-item>
          </text:list>
        </text:list-item>
        <text:list-item>
          <text:p text:style-name="P12"><text:span text:style-name="Strong_20_Emphasis"><text:span text:style-name="T2">Relative-position features.</text:span></text:span></text:p>
          <text:list>
            <text:list-item>
              <text:p text:style-name="P12"><text:span text:style-name="Source_20_Text"><text:span text:style-name="T2">close_over_sma_20</text:span></text:span>, <text:span text:style-name="Source_20_Text"><text:span text:style-name="T2">close_over_sma_50</text:span></text:span>, <text:span text:style-name="Source_20_Text"><text:span text:style-name="T2">close_over_sma_200</text:span></text:span> as <text:span text:style-name="Source_20_Text"><text:span text:style-name="T2">close / sma_x</text:span></text:span></text:p>
            </text:list-item>
          </text:list>
        </text:list-item>
        <text:list-item>
          <text:p text:style-name="P12"><text:span text:style-name="Strong_20_Emphasis"><text:span text:style-name="T2">Trend slope approximations.</text:span></text:span></text:p>
          <text:list>
            <text:list-item>
              <text:p text:style-name="P12"><text:span text:style-name="Source_20_Text"><text:span text:style-name="T2">sma_20_slope_5d</text:span></text:span>, <text:span text:style-name="Source_20_Text"><text:span text:style-name="T2">sma_50_slope_5d</text:span></text:span>: relative change in SMA over last 5 days</text:p>
            </text:list-item>
          </text:list>
        </text:list-item>
      </text:list>
      <text:h text:style-name="P2" text:outline-level="2"><text:bookmark text:name="54-volatility-features"/>5.4 Volatility features</text:h>
      <text:list text:style-name="L11">
        <text:list-item>
          <text:p text:style-name="P13"><text:span text:style-name="Strong_20_Emphasis"><text:span text:style-name="T2">Rolling return volatility.</text:span></text:span></text:p>
          <text:list>
            <text:list-item>
              <text:p text:style-name="P13"><text:span text:style-name="Source_20_Text"><text:span text:style-name="T2">vol_ret_5d</text:span></text:span>, <text:span text:style-name="Source_20_Text"><text:span text:style-name="T2">vol_ret_20d</text:span></text:span>, <text:span text:style-name="Source_20_Text"><text:span text:style-name="T2">vol_ret_60d</text:span></text:span>: rolling std of <text:span text:style-name="Source_20_Text"><text:span text:style-name="T2">ret_1d</text:span></text:span> over respective windows</text:p>
            </text:list-item>
          </text:list>
        </text:list-item>
        <text:list-item>
          <text:p text:style-name="P13"><text:span text:style-name="Strong_20_Emphasis"><text:span text:style-name="T2">True-range volatility.</text:span></text:span></text:p>
          <text:list>
            <text:list-item>
              <text:p text:style-name="P13"><text:span text:style-name="Source_20_Text"><text:span text:style-name="T2">vol_tr_5d</text:span></text:span>, <text:span text:style-name="Source_20_Text"><text:span text:style-name="T2">vol_tr_20d</text:span></text:span>: rolling std of <text:span text:style-name="Source_20_Text"><text:span text:style-name="T2">true_range</text:span></text:span></text:p>
            </text:list-item>
          </text:list>
        </text:list-item>
      </text:list>
      <text:h text:style-name="P2" text:outline-level="2"><text:bookmark text:name="55-volume-and-liquidity-features"/>5.5 Volume and liquidity features</text:h>
      <text:list text:style-name="L12">
        <text:list-item>
          <text:p text:style-name="P14"><text:span text:style-name="Strong_20_Emphasis"><text:span text:style-name="T2">Base + rolling volume.</text:span></text:span></text:p>
          <text:list>
            <text:list-item>
              <text:p text:style-name="P14"><text:span text:style-name="Source_20_Text"><text:span text:style-name="T6">value</text:span></text:span><text:span text:style-name="Source_20_Text"><text:span text:style-name="T2">_</text:span></text:span><text:span text:style-name="Source_20_Text"><text:span text:style-name="T6">traded</text:span></text:span>: <text:span text:style-name="Source_20_Text"><text:span text:style-name="T2">close * volume</text:span></text:span></text:p>
            </text:list-item>
            <text:list-item>
              <text:p text:style-name="P14"><text:span text:style-name="Source_20_Text"><text:span text:style-name="T2">vol_ma_20</text:span></text:span>, <text:span text:style-name="Source_20_Text"><text:span text:style-name="T2">vol_ma_60</text:span></text:span>: moving averages of <text:span text:style-name="Source_20_Text"><text:span text:style-name="T2">volume</text:span></text:span></text:p>
            </text:list-item>
            <text:list-item>
              <text:p text:style-name="P14"><text:span text:style-name="Source_20_Text"><text:span text:style-name="T2">vol_rel_20</text:span></text:span>: <text:span text:style-name="Source_20_Text"><text:span text:style-name="T2">volume / vol_ma_20</text:span></text:span></text:p>
            </text:list-item>
            <text:list-item>
              <text:p text:style-name="P15"><text:span text:style-name="Source_20_Text"><text:span text:style-name="T6">value</text:span></text:span><text:span text:style-name="Source_20_Text"><text:span text:style-name="T2">_</text:span></text:span><text:span text:style-name="Source_20_Text"><text:span text:style-name="T6">traded</text:span></text:span><text:span text:style-name="Source_20_Text"><text:span text:style-name="T2">_ma_20</text:span></text:span>, <text:span text:style-name="Source_20_Text"><text:span text:style-name="T6">value</text:span></text:span><text:span text:style-name="Source_20_Text"><text:span text:style-name="T2">_</text:span></text:span><text:span text:style-name="Source_20_Text"><text:span text:style-name="T6">traded</text:span></text:span><text:span text:style-name="Source_20_Text"><text:span text:style-name="T2">_rel_20</text:span></text:span>: similar for <text:span text:style-name="Source_20_Text"><text:span text:style-name="T6">value</text:span></text:span><text:span text:style-name="Source_20_Text"><text:span text:style-name="T2">_</text:span></text:span><text:span text:style-name="Source_20_Text"><text:span text:style-name="T6">traded</text:span></text:span></text:p>
            </text:list-item>
          </text:list>
        </text:list-item>
        <text:list-item>
          <text:p text:style-name="P14"><text:span text:style-name="Strong_20_Emphasis"><text:span text:style-name="T2">Rationale.</text:span></text:span><text:line-break/><text:span text:style-name="T5">T</text:span>hese help capture unusual trading activity or illiquidity.</text:p>
        </text:list-item>
      </text:list>
      <text:h text:style-name="P2" text:outline-level="2"><text:bookmark text:name="56-technical-indicators"/>5.6 Technical indicators</text:h>
      <text:list text:style-name="L13">
        <text:list-item>
          <text:p text:style-name="P16"><text:span text:style-name="Strong_20_Emphasis"><text:span text:style-name="T2">RSI.</text:span></text:span></text:p>
          <text:list>
            <text:list-item>
              <text:p text:style-name="P16"><text:span text:style-name="Source_20_Text"><text:span text:style-name="T2">rsi_14</text:span></text:span>: 14-day RSI on <text:span text:style-name="Source_20_Text"><text:span text:style-name="T2">close</text:span></text:span></text:p>
            </text:list-item>
          </text:list>
        </text:list-item>
        <text:list-item>
          <text:p text:style-name="P16"><text:span text:style-name="Strong_20_Emphasis"><text:span text:style-name="T2">MACD.</text:span></text:span></text:p>
          <text:list>
            <text:list-item>
              <text:p text:style-name="P16"><text:span text:style-name="Source_20_Text"><text:span text:style-name="T2">macd</text:span></text:span>: EMA 12 - EMA 26</text:p>
            </text:list-item>
            <text:list-item>
              <text:p text:style-name="P16"><text:span text:style-name="Source_20_Text"><text:span text:style-name="T2">macd_signal</text:span></text:span>: 9-day EMA of <text:span text:style-name="Source_20_Text"><text:span text:style-name="T2">macd</text:span></text:span></text:p>
            </text:list-item>
            <text:list-item>
              <text:p text:style-name="P16"><text:span text:style-name="Source_20_Text"><text:span text:style-name="T2">macd_hist</text:span></text:span>: difference between MACD and signal</text:p>
            </text:list-item>
          </text:list>
        </text:list-item>
        <text:list-item>
          <text:p text:style-name="P16"><text:soft-page-break/><text:span text:style-name="Strong_20_Emphasis"><text:span text:style-name="T2">ATR.</text:span></text:span></text:p>
          <text:list>
            <text:list-item>
              <text:p text:style-name="P16"><text:span text:style-name="Source_20_Text"><text:span text:style-name="T2">atr_14</text:span></text:span>: 14-day Average True Range (EMA of <text:span text:style-name="Source_20_Text"><text:span text:style-name="T2">true_range</text:span></text:span>)</text:p>
            </text:list-item>
          </text:list>
        </text:list-item>
      </text:list>
      <text:h text:style-name="P2" text:outline-level="2"><text:bookmark text:name="57-highlow-context"/>5.7 High/low context</text:h>
      <text:list text:style-name="L14">
        <text:list-item>
          <text:p text:style-name="P17"><text:span text:style-name="Strong_20_Emphasis"><text:span text:style-name="T2">Rolling highs/lows.</text:span></text:span></text:p>
          <text:list>
            <text:list-item>
              <text:p text:style-name="P17"><text:span text:style-name="Source_20_Text"><text:span text:style-name="T2">hh_20d</text:span></text:span>, <text:span text:style-name="Source_20_Text"><text:span text:style-name="T2">ll_20d</text:span></text:span>: 20-day highest high and lowest low</text:p>
            </text:list-item>
            <text:list-item>
              <text:p text:style-name="P17"><text:span text:style-name="Source_20_Text"><text:span text:style-name="T2">dist_from_20d_high</text:span></text:span>: <text:span text:style-name="Source_20_Text"><text:span text:style-name="T2">(close / hh_20d) - 1</text:span></text:span></text:p>
            </text:list-item>
            <text:list-item>
              <text:p text:style-name="P17"><text:span text:style-name="Source_20_Text"><text:span text:style-name="T2">dist_from_20d_low</text:span></text:span>: <text:span text:style-name="Source_20_Text"><text:span text:style-name="T2">(close / ll_20d) - 1</text:span></text:span></text:p>
            </text:list-item>
          </text:list>
        </text:list-item>
      </text:list>
      <text:h text:style-name="P2" text:outline-level="2"><text:bookmark text:name="58-feature-consolidation-and-final-dataset"/>5.8 Feature consolidation and final dataset</text:h>
      <text:list text:style-name="L15">
        <text:list-item>
          <text:p text:style-name="P18"><text:span text:style-name="Strong_20_Emphasis"><text:span text:style-name="T2">how to merge all features.</text:span></text:span></text:p>
          <text:list>
            <text:list-item>
              <text:p text:style-name="P18">Ensure features for each symbol are aligned by date</text:p>
            </text:list-item>
            <text:list-item>
              <text:p text:style-name="P18">Drop rows where any required feature cannot be computed due to insufficient history</text:p>
            </text:list-item>
          </text:list>
        </text:list-item>
        <text:list-item>
          <text:p text:style-name="P18"><text:span text:style-name="Strong_20_Emphasis"><text:span text:style-name="T2">feature sanity checks.</text:span></text:span></text:p>
          <text:list>
            <text:list-item>
              <text:p text:style-name="P18">Inspect distributions and correlations</text:p>
            </text:list-item>
            <text:list-item>
              <text:p text:style-name="P18">Check for constant or near-constant features to potentially drop</text:p>
            </text:list-item>
          </text:list>
        </text:list-item>
      </text:list>
      <text:p text:style-name="Horizontal_20_Line"/>
      <text:h text:style-name="P2" text:outline-level="2"><text:bookmark text:name="6-target-construction-1month-direction-labels"/>6. Target construction (1‑month direction labels)</text:h>
      <text:h text:style-name="P2" text:outline-level="2"><text:bookmark text:name="61-forward-return-calculation"/>6.1 Forward return calculation</text:h>
      <text:list text:style-name="L16">
        <text:list-item>
          <text:p text:style-name="P19"><text:span text:style-name="Strong_20_Emphasis"><text:span text:style-name="T2">Define the forward 20-day return.</text:span></text:span></text:p>
          <text:list>
            <text:list-item>
              <text:p text:style-name="P19"><text:span text:style-name="Source_20_Text"><text:span text:style-name="T2">fwd_ret_20d = (close_t+20 / close_t) - 1</text:span></text:span> aligned so that features at time t predict <text:span text:style-name="Source_20_Text"><text:span text:style-name="T2">fwd_ret_20d</text:span></text:span></text:p>
            </text:list-item>
          </text:list>
        </text:list-item>
        <text:list-item>
          <text:p text:style-name="P19"><text:span text:style-name="Strong_20_Emphasis"><text:span text:style-name="T2">Handle edge cases.</text:span></text:span></text:p>
          <text:list>
            <text:list-item>
              <text:p text:style-name="P19">For the last 20 days in each symbol’s series, <text:span text:style-name="Source_20_Text"><text:span text:style-name="T2">fwd_ret_20d</text:span></text:span> is undefined → drop those rows from modeling.</text:p>
            </text:list-item>
          </text:list>
        </text:list-item>
      </text:list>
      <text:h text:style-name="P2" text:outline-level="2"><text:bookmark text:name="62-label-definition-and-thresholds"/>6.2 Label definition and thresholds</text:h>
      <text:list text:style-name="L17">
        <text:list-item>
          <text:p text:style-name="P20"><text:span text:style-name="Strong_20_Emphasis"><text:span text:style-name="T2">Define thresholds.</text:span></text:span></text:p>
          <text:list>
            <text:list-item>
              <text:p text:style-name="P20">Buying threshold: e.g. <text:span text:style-name="Source_20_Text"><text:span text:style-name="T2">fwd_ret_20d &gt; +5%</text:span></text:span></text:p>
            </text:list-item>
            <text:list-item>
              <text:p text:style-name="P20">Selling threshold: e.g. <text:span text:style-name="Source_20_Text"><text:span text:style-name="T2">fwd_ret_20d &lt; -5%</text:span></text:span></text:p>
            </text:list-item>
            <text:list-item>
              <text:p text:style-name="P20">Otherwise hold</text:p>
            </text:list-item>
          </text:list>
        </text:list-item>
        <text:list-item>
          <text:p text:style-name="P20"><text:span text:style-name="Strong_20_Emphasis"><text:span text:style-name="T2">Construct label.</text:span></text:span></text:p>
          <text:list>
            <text:list-item>
              <text:p text:style-name="P20"><text:soft-page-break/><text:span text:style-name="Source_20_Text"><text:span text:style-name="T2">label_1m = 1</text:span></text:span> for buy, <text:span text:style-name="Source_20_Text"><text:span text:style-name="T2">0</text:span></text:span> for hold, <text:span text:style-name="Source_20_Text"><text:span text:style-name="T2">-1</text:span></text:span> for sell</text:p>
            </text:list-item>
          </text:list>
        </text:list-item>
        <text:list-item>
          <text:p text:style-name="P20"><text:span text:style-name="Strong_20_Emphasis"><text:span text:style-name="T2">Justify thresholds.</text:span></text:span></text:p>
          <text:list>
            <text:list-item>
              <text:p text:style-name="P20">±5% is a starting point; may later <text:span text:style-name="T7">be </text:span>adjust<text:span text:style-name="T7">ed</text:span> based on class balance and strategy needs.</text:p>
            </text:list-item>
          </text:list>
        </text:list-item>
      </text:list>
      <text:h text:style-name="P2" text:outline-level="2"><text:bookmark text:name="63-class-balance-and-basic-diagnostics"/>6.3 Class balance and basic diagnostics</text:h>
      <text:list text:style-name="L18">
        <text:list-item>
          <text:p text:style-name="P21">Compute and inspect the class distribution of <text:span text:style-name="Source_20_Text"><text:span text:style-name="T2">label_1m</text:span></text:span> (buy / hold / sell) over the full dataset and per year.</text:p>
        </text:list-item>
        <text:list-item>
          <text:p text:style-name="P21">Expect <text:span text:style-name="Strong_20_Emphasis"><text:span text:style-name="T2">hold</text:span></text:span> to dominate the label distribution, with buy and sell being minority classes due to the ±5% threshold definition.</text:p>
        </text:list-item>
        <text:list-item>
          <text:p text:style-name="P21">Quantify the imbalance (e.g. percentage of each class).</text:p>
        </text:list-item>
        <text:list-item>
          <text:p text:style-name="P22"><text:span text:style-name="T7">Allow</text:span> mitigation strategies for this imbalance, such as:</text:p>
          <text:list>
            <text:list-item>
              <text:p text:style-name="P21">using <text:span text:style-name="Strong_20_Emphasis"><text:span text:style-name="T2">class weights</text:span></text:span> in models that support them (e.g. LogisticRegression, RandomForest, HistGradientBoosting),</text:p>
            </text:list-item>
            <text:list-item>
              <text:p text:style-name="P21">optionally adjusting the buy/sell thresholds (e.g. from ±5% to ±3–4%) to achieve a more informative class distribution,</text:p>
            </text:list-item>
            <text:list-item>
              <text:p text:style-name="P21">monitoring performance specifically on the minority action classes (buy, sell) via precision/recall/F1, not just overall accuracy.</text:p>
            </text:list-item>
          </text:list>
        </text:list-item>
      </text:list>
      <text:h text:style-name="P2" text:outline-level="2"><text:bookmark text:name="7-trainvalidationtest-splitting-time-aware"/>7. Train/validation/test splitting (time-aware)</text:h>
      <text:h text:style-name="P2" text:outline-level="2"><text:bookmark text:name="71-chronological-splitting-strategy"/>7.1 Chronological splitting strategy</text:h>
      <text:list text:style-name="L19">
        <text:list-item>
          <text:p text:style-name="P23"><text:span text:style-name="Strong_20_Emphasis"><text:span text:style-name="T2">time-aware splitting is needed.</text:span></text:span></text:p>
          <text:list>
            <text:list-item>
              <text:p text:style-name="P23">Prevents future information leakage</text:p>
            </text:list-item>
          </text:list>
        </text:list-item>
        <text:list-item>
          <text:p text:style-name="P23"><text:span text:style-name="Strong_20_Emphasis"><text:span text:style-name="T2">Define the splits.</text:span></text:span></text:p>
          <text:list>
            <text:list-item>
              <text:p text:style-name="P23">Sort all rows by <text:span text:style-name="Source_20_Text"><text:span text:style-name="T2">date</text:span></text:span> (and <text:span text:style-name="Source_20_Text"><text:span text:style-name="T2">symbol</text:span></text:span> if needed for stability)</text:p>
            </text:list-item>
            <text:list-item>
              <text:p text:style-name="P23">Choose split dates so that:</text:p>
              <text:list>
                <text:list-item>
                  <text:p text:style-name="P23">Training set: earliest ~70% of the time span</text:p>
                </text:list-item>
                <text:list-item>
                  <text:p text:style-name="P23">Validation set: next ~15%</text:p>
                </text:list-item>
                <text:list-item>
                  <text:p text:style-name="P23">Test set: most recent ~15%</text:p>
                </text:list-item>
              </text:list>
            </text:list-item>
          </text:list>
        </text:list-item>
        <text:list-item>
          <text:p text:style-name="P23"><text:span text:style-name="Strong_20_Emphasis"><text:span text:style-name="T2">Record actual date cutoffs.</text:span></text:span></text:p>
          <text:list>
            <text:list-item>
              <text:p text:style-name="P23"><text:soft-page-break/>E.g. training up to 2019‑12‑31, validation 2020–2021, test 2022–2023 (just as an example depending on actual dates)</text:p>
            </text:list-item>
          </text:list>
        </text:list-item>
      </text:list>
      <text:h text:style-name="P2" text:outline-level="2"><text:bookmark text:name="72-timeseriessplit-for-tuning"/>7.2 TimeSeriesSplit for tuning</text:h>
      <text:list text:style-name="L20">
        <text:list-item>
          <text:p text:style-name="P24"><text:span text:style-name="Strong_20_Emphasis"><text:span text:style-name="T2">internal cross-validation.</text:span></text:span></text:p>
          <text:list>
            <text:list-item>
              <text:p text:style-name="P24">Within the combined training+validation period, <text:s/>use <text:span text:style-name="Source_20_Text"><text:span text:style-name="T2">TimeSeriesSplit</text:span></text:span> (e.g. 4–5 splits) for hyperparameter tuning.</text:p>
            </text:list-item>
          </text:list>
        </text:list-item>
        <text:list-item>
          <text:p text:style-name="P24"><text:span text:style-name="Strong_20_Emphasis"><text:span text:style-name="T2">usage.</text:span></text:span></text:p>
          <text:list>
            <text:list-item>
              <text:p text:style-name="P24">Final test set remains untouched until the very end.</text:p>
            </text:list-item>
            <text:list-item>
              <text:p text:style-name="P24"><text:span text:style-name="Source_20_Text"><text:span text:style-name="T2">TimeSeriesSplit</text:span></text:span> ensures each fold respects chronology.</text:p>
            </text:list-item>
          </text:list>
        </text:list-item>
      </text:list>
      <text:p text:style-name="Horizontal_20_Line"/>
      <text:h text:style-name="P2" text:outline-level="2"><text:bookmark text:name="8-feature-scaling--preprocessing-strategy"/>8. Feature scaling / preprocessing strategy</text:h>
      <text:h text:style-name="P2" text:outline-level="2"><text:bookmark text:name="81-which-models-need-scaling"/>8.1 Which models need scaling</text:h>
      <text:list text:style-name="L21">
        <text:list-item>
          <text:p text:style-name="P25"><text:span text:style-name="Strong_20_Emphasis"><text:span text:style-name="T2">scaling needs.</text:span></text:span></text:p>
          <text:list>
            <text:list-item>
              <text:p text:style-name="P25">Logistic Regression, Linear SVM, MLP: require feature scaling</text:p>
            </text:list-item>
            <text:list-item>
              <text:p text:style-name="P25">Tree-based models (RF, Extra Trees, HistGB) generally do <text:span text:style-name="Strong_20_Emphasis"><text:span text:style-name="T2">not</text:span></text:span> need scaling and may work better on raw features</text:p>
            </text:list-item>
          </text:list>
        </text:list-item>
        <text:list-item>
          <text:p text:style-name="P25"><text:span text:style-name="Strong_20_Emphasis"><text:span text:style-name="T2">transformation approach.</text:span></text:span></text:p>
          <text:list>
            <text:list-item>
              <text:p text:style-name="P25">For scaling, use e.g. <text:span text:style-name="Source_20_Text"><text:span text:style-name="T2">StandardScaler</text:span></text:span> fitted on training data only, applied to validation/test.</text:p>
            </text:list-item>
          </text:list>
        </text:list-item>
      </text:list>
      <text:h text:style-name="P2" text:outline-level="2"><text:bookmark text:name="82-preprocessing-pipelines"/>8.2 Preprocessing pipelines</text:h>
      <text:list text:style-name="L22">
        <text:list-item>
          <text:p text:style-name="P26"><text:span text:style-name="Strong_20_Emphasis"><text:span text:style-name="T2">use of sklearn Pipelines.</text:span></text:span></text:p>
          <text:list>
            <text:list-item>
              <text:p text:style-name="P26">Build pipelines combining scaling (where needed) and the model</text:p>
            </text:list-item>
            <text:list-item>
              <text:p text:style-name="P26">Ensures no data leakage and consistent preprocessing across splits</text:p>
            </text:list-item>
          </text:list>
        </text:list-item>
      </text:list>
      <text:p text:style-name="Horizontal_20_Line"/>
      <text:h text:style-name="P2" text:outline-level="2"><text:bookmark text:name="9-baseline-and-candidate-models"/>9. Baseline and candidate models</text:h>
      <text:h text:style-name="P2" text:outline-level="2"><text:bookmark text:name="91-baseline-simple-strategy"/>9.1 Baseline: simple strategy</text:h>
      <text:list text:style-name="L23">
        <text:list-item>
          <text:p text:style-name="P27"><text:span text:style-name="Strong_20_Emphasis"><text:span text:style-name="T2">Define a trivial baseline for comparison.</text:span></text:span><text:line-break/>Examples:</text:p>
          <text:list>
            <text:list-item>
              <text:p text:style-name="P27">Always predict <text:span text:style-name="Source_20_Text"><text:span text:style-name="T2">hold</text:span></text:span></text:p>
            </text:list-item>
            <text:list-item>
              <text:p text:style-name="P27">Always predict the majority class in the training set</text:p>
            </text:list-item>
            <text:list-item>
              <text:p text:style-name="P27"><text:soft-page-break/>Simple rule-based: if <text:span text:style-name="Source_20_Text"><text:span text:style-name="T2">ret_20d</text:span></text:span> &gt; 0 then buy else sell</text:p>
            </text:list-item>
          </text:list>
        </text:list-item>
        <text:list-item>
          <text:p text:style-name="P27">Ensures that ML models outperform naive rules.</text:p>
        </text:list-item>
      </text:list>
      <text:h text:style-name="P2" text:outline-level="2"><text:bookmark text:name="92-candidate-models-shortlist"/>9.2 Candidate models shortlist</text:h>
      <text:list text:style-name="L24">
        <text:list-item>
          <text:p text:style-name="P28"><text:span text:style-name="Strong_20_Emphasis"><text:span text:style-name="T2">the models to compare.</text:span></text:span></text:p>
          <text:list>
            <text:list-item>
              <text:p text:style-name="P28"><text:span text:style-name="Source_20_Text"><text:span text:style-name="T2">LogisticRegression</text:span></text:span> (multinomial)</text:p>
            </text:list-item>
            <text:list-item>
              <text:p text:style-name="P28"><text:span text:style-name="Source_20_Text"><text:span text:style-name="T2">RandomForestClassifier</text:span></text:span></text:p>
            </text:list-item>
            <text:list-item>
              <text:p text:style-name="P28"><text:span text:style-name="Source_20_Text"><text:span text:style-name="T2">ExtraTreesClassifier</text:span></text:span></text:p>
            </text:list-item>
            <text:list-item>
              <text:p text:style-name="P28"><text:span text:style-name="Source_20_Text"><text:span text:style-name="T2">HistGradientBoostingClassifier</text:span></text:span></text:p>
            </text:list-item>
            <text:list-item>
              <text:p text:style-name="P28"><text:span text:style-name="Source_20_Text"><text:span text:style-name="T2">LinearSVC</text:span></text:span></text:p>
            </text:list-item>
            <text:list-item>
              <text:p text:style-name="P28"><text:span text:style-name="Source_20_Text"><text:span text:style-name="T2">MLPClassifier</text:span></text:span></text:p>
            </text:list-item>
          </text:list>
        </text:list-item>
        <text:list-item>
          <text:p text:style-name="P28"><text:span text:style-name="Strong_20_Emphasis"><text:span text:style-name="T2">all are from scikit-learn.</text:span></text:span><text:line-break/>start with default-ish settings then tune.</text:p>
        </text:list-item>
      </text:list>
      <text:h text:style-name="P2" text:outline-level="2"><text:bookmark text:name="93-model-specific-notes"/>9.3 Model-specific notes</text:h>
      <text:list text:style-name="L25">
        <text:list-item>
          <text:p text:style-name="P29"><text:span text:style-name="Strong_20_Emphasis"><text:span text:style-name="T2">Logistic Regression.</text:span></text:span></text:p>
          <text:list>
            <text:list-item>
              <text:p text:style-name="P29">Multinomial, regularization parameter C, class weights</text:p>
            </text:list-item>
          </text:list>
        </text:list-item>
        <text:list-item>
          <text:p text:style-name="P29"><text:span text:style-name="Strong_20_Emphasis"><text:span text:style-name="T2">Random Forest &amp; Extra Trees.</text:span></text:span></text:p>
          <text:list>
            <text:list-item>
              <text:p text:style-name="P29">Number of trees, max depth, min samples per leaf, class weight</text:p>
            </text:list-item>
          </text:list>
        </text:list-item>
        <text:list-item>
          <text:p text:style-name="P29"><text:span text:style-name="Strong_20_Emphasis"><text:span text:style-name="T2">HistGradientBoosting.</text:span></text:span></text:p>
          <text:list>
            <text:list-item>
              <text:p text:style-name="P29">Learning rate, max depth/max leaf nodes, number of iterations, regularization</text:p>
            </text:list-item>
          </text:list>
        </text:list-item>
      </text:list>
      <text:p text:style-name="Horizontal_20_Line"/>
      <text:h text:style-name="P2" text:outline-level="2"><text:bookmark text:name="10-evaluation-metrics-and-reporting"/>10. Evaluation metrics and reporting</text:h>
      <text:h text:style-name="P2" text:outline-level="2"><text:bookmark text:name="101-core-metrics"/>10.1 Core metrics</text:h>
      <text:list text:style-name="L26">
        <text:list-item>
          <text:p text:style-name="P30"><text:span text:style-name="Strong_20_Emphasis"><text:span text:style-name="T2">Primary metrics.</text:span></text:span></text:p>
          <text:list>
            <text:list-item>
              <text:p text:style-name="P30">Macro F1 score (treats all classes equally)</text:p>
            </text:list-item>
            <text:list-item>
              <text:p text:style-name="P30">Weighted F1 score</text:p>
            </text:list-item>
          </text:list>
        </text:list-item>
        <text:list-item>
          <text:p text:style-name="P30"><text:span text:style-name="Strong_20_Emphasis"><text:span text:style-name="T2">Class-wise metrics.</text:span></text:span></text:p>
          <text:list>
            <text:list-item>
              <text:p text:style-name="P30">Precision, recall, F1 for each of <text:span text:style-name="Source_20_Text"><text:span text:style-name="T2">buy</text:span></text:span>, <text:span text:style-name="Source_20_Text"><text:span text:style-name="T2">hold</text:span></text:span>, <text:span text:style-name="Source_20_Text"><text:span text:style-name="T2">sell</text:span></text:span></text:p>
            </text:list-item>
            <text:list-item>
              <text:p text:style-name="P30">Especially focus on <text:span text:style-name="Source_20_Text"><text:span text:style-name="T2">buy</text:span></text:span> and <text:span text:style-name="Source_20_Text"><text:span text:style-name="T2">sell</text:span></text:span> performance, since those drive actions.</text:p>
            </text:list-item>
          </text:list>
        </text:list-item>
      </text:list>
      <text:h text:style-name="P2" text:outline-level="2"><text:bookmark text:name="102-additional-diagnostics"/><text:soft-page-break/>10.2 Additional diagnostics</text:h>
      <text:list text:style-name="L27">
        <text:list-item>
          <text:p text:style-name="P31"><text:span text:style-name="Strong_20_Emphasis"><text:span text:style-name="T2">Confusion matrices.</text:span></text:span></text:p>
          <text:list>
            <text:list-item>
              <text:p text:style-name="P31">For validation and final test</text:p>
            </text:list-item>
          </text:list>
        </text:list-item>
        <text:list-item>
          <text:p text:style-name="P31"><text:span text:style-name="Strong_20_Emphasis"><text:span text:style-name="T2">Balanced accuracy.</text:span></text:span></text:p>
          <text:list>
            <text:list-item>
              <text:p text:style-name="P31">To account for class imbalance</text:p>
            </text:list-item>
          </text:list>
        </text:list-item>
      </text:list>
      <text:h text:style-name="P2" text:outline-level="2"><text:bookmark text:name="103-simple-strategy-level-check-optional"/>10.3 Simple strategy-level check (optional)</text:h>
      <text:list text:style-name="L28">
        <text:list-item>
          <text:p text:style-name="P32"><text:span text:style-name="Strong_20_Emphasis"><text:span text:style-name="T2">basic backtest sketch.</text:span></text:span></text:p>
          <text:list>
            <text:list-item>
              <text:p text:style-name="P32">For each day in test set, convert predicted label into an action: long / flat / short </text:p>
            </text:list-item>
            <text:list-item>
              <text:p text:style-name="P32">Track cumulative returns with simple assumptions (no transaction costs at first)</text:p>
            </text:list-item>
          </text:list>
        </text:list-item>
        <text:list-item>
          <text:p text:style-name="P32"><text:span text:style-name="Strong_20_Emphasis"><text:span text:style-name="T2">this is a rough diagnostic, not a full trading simulation.</text:span></text:span></text:p>
        </text:list-item>
      </text:list>
      <text:p text:style-name="Horizontal_20_Line"/>
      <text:h text:style-name="P2" text:outline-level="2"><text:bookmark text:name="11-model-training-and-comparison-workflow"/>11. Model training and comparison workflow</text:h>
      <text:h text:style-name="P2" text:outline-level="2"><text:bookmark text:name="111-first-pass-training-with-default-ish-hyperpara"/>11.1 First-pass training with default-ish hyperparameters</text:h>
      <text:list text:style-name="L29">
        <text:list-item>
          <text:p text:style-name="P33"><text:span text:style-name="Strong_20_Emphasis"><text:span text:style-name="T2">Describe initial fit.</text:span></text:span></text:p>
          <text:list>
            <text:list-item>
              <text:p text:style-name="P33">Train each candidate model on the training set (with proper preprocessing pipeline)</text:p>
            </text:list-item>
            <text:list-item>
              <text:p text:style-name="P33">Evaluate on validation set using the chosen metrics</text:p>
            </text:list-item>
          </text:list>
        </text:list-item>
        <text:list-item>
          <text:p text:style-name="P33"><text:span text:style-name="Strong_20_Emphasis"><text:span text:style-name="T2">Goal of this step.</text:span></text:span></text:p>
          <text:list>
            <text:list-item>
              <text:p text:style-name="P33">Identify which models are promising before investing time in tuning.</text:p>
            </text:list-item>
          </text:list>
        </text:list-item>
      </text:list>
      <text:h text:style-name="P2" text:outline-level="2"><text:bookmark text:name="112-hyperparameter-tuning-for-top-models"/>11.2 Hyperparameter tuning for top models</text:h>
      <text:list text:style-name="L30">
        <text:list-item>
          <text:p text:style-name="P34"><text:span text:style-name="Strong_20_Emphasis"><text:span text:style-name="T2">Select top 2 models based on validation performance.</text:span></text:span></text:p>
        </text:list-item>
        <text:list-item>
          <text:p text:style-name="P34"><text:span text:style-name="Strong_20_Emphasis"><text:span text:style-name="T2">tuning approach.</text:span></text:span></text:p>
          <text:list>
            <text:list-item>
              <text:p text:style-name="P34">Use time-series aware CV (via <text:span text:style-name="Source_20_Text"><text:span text:style-name="T2">TimeSeriesSplit</text:span></text:span>) on training+validation</text:p>
            </text:list-item>
            <text:list-item>
              <text:p text:style-name="P34">Use a moderate search: e.g. <text:span text:style-name="Source_20_Text"><text:span text:style-name="T2">RandomizedSearchCV</text:span></text:span> or small <text:span text:style-name="Source_20_Text"><text:span text:style-name="T2">GridSearchCV</text:span></text:span></text:p>
            </text:list-item>
          </text:list>
        </text:list-item>
        <text:list-item>
          <text:p text:style-name="P34"><text:span text:style-name="Strong_20_Emphasis"><text:span text:style-name="T2">parameter grids.</text:span></text:span></text:p>
          <text:list>
            <text:list-item>
              <text:p text:style-name="P34">For example (high-level description, no code):</text:p>
              <text:list>
                <text:list-item>
                  <text:p text:style-name="P34"><text:soft-page-break/>Random Forest: <text:span text:style-name="Source_20_Text"><text:span text:style-name="T2">n_estimators</text:span></text:span>, <text:span text:style-name="Source_20_Text"><text:span text:style-name="T2">max_depth</text:span></text:span>, <text:span text:style-name="Source_20_Text"><text:span text:style-name="T2">min_samples_leaf</text:span></text:span>, <text:span text:style-name="Source_20_Text"><text:span text:style-name="T2">max_features</text:span></text:span></text:p>
                </text:list-item>
                <text:list-item>
                  <text:p text:style-name="P34">HistGB: <text:span text:style-name="Source_20_Text"><text:span text:style-name="T2">learning_rate</text:span></text:span>, <text:span text:style-name="Source_20_Text"><text:span text:style-name="T2">max_depth</text:span></text:span>/<text:span text:style-name="Source_20_Text"><text:span text:style-name="T2">max_leaf_nodes</text:span></text:span>, <text:span text:style-name="Source_20_Text"><text:span text:style-name="T2">max_iter</text:span></text:span>, regularization params</text:p>
                </text:list-item>
              </text:list>
            </text:list-item>
          </text:list>
        </text:list-item>
      </text:list>
      <text:h text:style-name="P2" text:outline-level="2"><text:bookmark text:name="113-final-model-selection"/>11.3 Final model selection</text:h>
      <text:list text:style-name="L31">
        <text:list-item>
          <text:p text:style-name="P35"><text:span text:style-name="Strong_20_Emphasis"><text:span text:style-name="T2">choose the final model.</text:span></text:span></text:p>
          <text:list>
            <text:list-item>
              <text:p text:style-name="P35">Compare tuned models on validation metrics and stability across folds</text:p>
            </text:list-item>
            <text:list-item>
              <text:p text:style-name="P35">Also consider complexity and training time</text:p>
            </text:list-item>
          </text:list>
        </text:list-item>
        <text:list-item>
          <text:p text:style-name="P35"><text:span text:style-name="Strong_20_Emphasis"><text:span text:style-name="T2">Freeze the chosen model and parameters.</text:span></text:span></text:p>
        </text:list-item>
      </text:list>
      <text:p text:style-name="Horizontal_20_Line"/>
      <text:h text:style-name="P2" text:outline-level="2"><text:bookmark text:name="12-final-evaluation-on-hold-out-test-set"/>12. Final evaluation on hold-out test set</text:h>
      <text:h text:style-name="P2" text:outline-level="2"><text:bookmark text:name="121-test-set-performance"/>12.1 Test-set performance</text:h>
      <text:list text:style-name="L32">
        <text:list-item>
          <text:p text:style-name="P36"><text:span text:style-name="Strong_20_Emphasis"><text:span text:style-name="T2">process.</text:span></text:span></text:p>
          <text:list>
            <text:list-item>
              <text:p text:style-name="P36">Refit each finalist model on <text:span text:style-name="Strong_20_Emphasis"><text:span text:style-name="T2">training + validation</text:span></text:span> data using the chosen hyperparameters</text:p>
            </text:list-item>
            <text:list-item>
              <text:p text:style-name="P36">Evaluate on the untouched test set</text:p>
            </text:list-item>
          </text:list>
        </text:list-item>
        <text:list-item>
          <text:p text:style-name="P36"><text:span text:style-name="Strong_20_Emphasis"><text:span text:style-name="T2">Record metrics.</text:span></text:span></text:p>
          <text:list>
            <text:list-item>
              <text:p text:style-name="P36">Macro F1, class-wise precision/recall/F1, confusion matrix</text:p>
            </text:list-item>
          </text:list>
        </text:list-item>
        <text:list-item>
          <text:p text:style-name="P36"><text:span text:style-name="Strong_20_Emphasis"><text:span text:style-name="T2">Compare against baseline.</text:span></text:span></text:p>
          <text:list>
            <text:list-item>
              <text:p text:style-name="P36">Show that the chosen model meaningfully beats trivial strategies.</text:p>
            </text:list-item>
          </text:list>
        </text:list-item>
      </text:list>
      <text:h text:style-name="P2" text:outline-level="2"><text:bookmark text:name="122-interpretation-and-error-analysis"/>12.2 Interpretation and error analysis</text:h>
      <text:list text:style-name="L33">
        <text:list-item>
          <text:p text:style-name="P37"><text:span text:style-name="Strong_20_Emphasis"><text:span text:style-name="T2">Inspect errors.</text:span></text:span></text:p>
          <text:list>
            <text:list-item>
              <text:p text:style-name="P37">Look at common misclassification patterns (e.g. buy vs hold confusion)</text:p>
            </text:list-item>
            <text:list-item>
              <text:p text:style-name="P37">Note any systematic issues (e.g. underperformance in high-vol regimes)</text:p>
            </text:list-item>
          </text:list>
        </text:list-item>
        <text:list-item>
          <text:p text:style-name="P37"><text:span text:style-name="Strong_20_Emphasis"><text:span text:style-name="T2">Feature importance / SHAP (optional).</text:span></text:span></text:p>
          <text:list>
            <text:list-item>
              <text:p text:style-name="P37">For tree-based models, look at feature importances to see which features matter most</text:p>
            </text:list-item>
            <text:list-item>
              <text:p text:style-name="P37">Note that this is exploratory, not a final causal conclusion.</text:p>
            </text:list-item>
          </text:list>
        </text:list-item>
      </text:list>
      <text:p text:style-name="Horizontal_20_Line"/>
      <text:h text:style-name="P2" text:outline-level="2"><text:soft-page-break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15:35:06.863294500</meta:creation-date>
    <dc:date>2026-04-12T20:05:33.660435900</dc:date>
    <meta:editing-duration>PT58M19S</meta:editing-duration>
    <meta:editing-cycles>1</meta:editing-cycles>
    <meta:document-statistic meta:table-count="0" meta:image-count="0" meta:object-count="0" meta:page-count="11" meta:paragraph-count="239" meta:word-count="1797" meta:character-count="11073" meta:non-whitespace-character-count="9710"/>
    <meta:generator>LibreOffice/26.2.2.2$Windows_X86_64 LibreOffice_project/1f77d10d6938fd34972958f64b2bcfa54f8b1ba5</meta:generator>
  </office:meta>
</office:document-meta>
</file>