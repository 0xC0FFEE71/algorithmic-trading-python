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2" style:family="paragraph" style:parent-style-name="Heading_20_2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 style:list-style-name="L2">
      <style:paragraph-properties fo:margin-left="0in" fo:margin-right="0in" fo:text-indent="0in" style:auto-text-indent="false" fo:padding="0in" fo:border="none"/>
      <style:text-properties officeooo:paragraph-rsid="001ca042"/>
    </style:style>
    <style:style style:name="P4" style:family="paragraph" style:parent-style-name="Text_20_body">
      <style:paragraph-properties fo:margin-left="0in" fo:margin-right="0in" fo:text-indent="0in" style:auto-text-indent="false" fo:padding="0in" fo:border="none"/>
      <style:text-properties officeooo:paragraph-rsid="001ca042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bbbebf" loext:opacity="100%" style:font-name="Consolas" fo:font-size="10.5pt" fo:font-weight="normal" fo:background-color="#121314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79c0ff" loext:opacity="100%" style:font-name="Consolas" fo:font-size="10.5pt" fo:font-weight="bold" fo:background-color="#121314"/>
    </style:style>
    <style:style style:name="P9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 style:list-style-name="L4">
      <style:paragraph-properties fo:margin-left="0in" fo:margin-right="0in" fo:text-indent="0in" style:auto-text-indent="false" fo:padding="0in" fo:border="none"/>
    </style:style>
    <style:style style:name="P12" style:family="paragraph" style:parent-style-name="Text_20_body" style:list-style-name="L5">
      <style:paragraph-properties fo:margin-left="0in" fo:margin-right="0in" fo:text-indent="0in" style:auto-text-indent="false" fo:padding="0in" fo:border="none"/>
    </style:style>
    <style:style style:name="P13" style:family="paragraph" style:parent-style-name="Text_20_body" style:list-style-name="L6">
      <style:paragraph-properties fo:margin-left="0in" fo:margin-right="0in" fo:text-indent="0in" style:auto-text-indent="false" fo:padding="0in" fo:border="none"/>
    </style:style>
    <style:style style:name="P14" style:family="paragraph" style:parent-style-name="Text_20_body" style:list-style-name="L7">
      <style:paragraph-properties fo:margin-left="0in" fo:margin-right="0in" fo:text-indent="0in" style:auto-text-indent="false" fo:padding="0in" fo:border="none"/>
    </style:style>
    <style:style style:name="P15" style:family="paragraph" style:parent-style-name="Text_20_body" style:list-style-name="L8">
      <style:paragraph-properties fo:margin-left="0in" fo:margin-right="0in" fo:text-indent="0in" style:auto-text-indent="false" fo:padding="0in" fo:border="none"/>
    </style:style>
    <style:style style:name="P16" style:family="paragraph" style:parent-style-name="Text_20_body" style:list-style-name="L9">
      <style:paragraph-properties fo:margin-left="0in" fo:margin-right="0in" fo:text-indent="0in" style:auto-text-indent="false" fo:padding="0in" fo:border="none"/>
    </style:style>
    <style:style style:name="P17" style:family="paragraph" style:parent-style-name="Text_20_body" style:list-style-name="L10">
      <style:paragraph-properties fo:margin-left="0in" fo:margin-right="0in" fo:text-indent="0in" style:auto-text-indent="false" fo:padding="0in" fo:border="none"/>
    </style:style>
    <style:style style:name="P18" style:family="paragraph" style:parent-style-name="Text_20_body" style:list-style-name="L11">
      <style:paragraph-properties fo:margin-left="0in" fo:margin-right="0in" fo:text-indent="0in" style:auto-text-indent="false" fo:padding="0in" fo:border="none"/>
    </style:style>
    <style:style style:name="P19" style:family="paragraph" style:parent-style-name="Text_20_body" style:list-style-name="L12">
      <style:paragraph-properties fo:margin-left="0in" fo:margin-right="0in" fo:text-indent="0in" style:auto-text-indent="false" fo:padding="0in" fo:border="none"/>
    </style:style>
    <style:style style:name="P20" style:family="paragraph" style:parent-style-name="Text_20_body" style:list-style-name="L13">
      <style:paragraph-properties fo:margin-left="0in" fo:margin-right="0in" fo:text-indent="0in" style:auto-text-indent="false" fo:padding="0in" fo:border="none"/>
    </style:style>
    <style:style style:name="P21" style:family="paragraph" style:parent-style-name="Text_20_body" style:list-style-name="L14">
      <style:paragraph-properties fo:margin-left="0in" fo:margin-right="0in" fo:text-indent="0in" style:auto-text-indent="false" fo:padding="0in" fo:border="none"/>
    </style:style>
    <style:style style:name="P22" style:family="paragraph" style:parent-style-name="Text_20_body" style:list-style-name="L15">
      <style:paragraph-properties fo:margin-left="0in" fo:margin-right="0in" fo:text-indent="0in" style:auto-text-indent="false" fo:padding="0in" fo:border="none"/>
    </style:style>
    <style:style style:name="P23" style:family="paragraph" style:parent-style-name="Text_20_body" style:list-style-name="L16">
      <style:paragraph-properties fo:margin-left="0in" fo:margin-right="0in" fo:text-indent="0in" style:auto-text-indent="false" fo:padding="0in" fo:border="none"/>
    </style:style>
    <style:style style:name="P24" style:family="paragraph" style:parent-style-name="Heading_20_2">
      <style:paragraph-properties fo:margin-left="0in" fo:margin-right="0in" fo:margin-top="0in" fo:margin-bottom="0.0972in" style:contextual-spacing="false" fo:line-height="115%" fo:text-indent="0in" style:auto-text-indent="false" fo:padding="0in" fo:border="none"/>
    </style:style>
    <style:style style:name="P25" style:family="paragraph" style:parent-style-name="Text_20_body" style:list-style-name="L17">
      <style:paragraph-properties fo:margin-left="0in" fo:margin-right="0in" fo:text-indent="0in" style:auto-text-indent="false" fo:padding="0in" fo:border="none"/>
    </style:style>
    <style:style style:name="P26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27" style:family="paragraph" style:parent-style-name="Text_20_body" style:list-style-name="L18">
      <style:paragraph-properties fo:margin-left="0in" fo:margin-right="0in" fo:text-indent="0in" style:auto-text-indent="false" fo:padding="0in" fo:border="none"/>
    </style:style>
    <style:style style:name="P28" style:family="paragraph" style:parent-style-name="Horizontal_20_Line">
      <style:paragraph-properties fo:margin-top="0in" fo:margin-bottom="0.0972in" style:contextual-spacing="false" fo:line-height="115%"/>
    </style:style>
    <style:style style:name="P29" style:family="paragraph" style:parent-style-name="Text_20_body" style:list-style-name="L19">
      <style:paragraph-properties fo:margin-left="0in" fo:margin-right="0in" fo:text-indent="0in" style:auto-text-indent="false" fo:padding="0in" fo:border="none"/>
    </style:style>
    <style:style style:name="P30" style:family="paragraph" style:parent-style-name="Text_20_body" style:list-style-name="L20">
      <style:paragraph-properties fo:margin-left="0in" fo:margin-right="0in" fo:text-indent="0in" style:auto-text-indent="false" fo:padding="0in" fo:border="none"/>
    </style:style>
    <style:style style:name="P31" style:family="paragraph" style:parent-style-name="Text_20_body" style:list-style-name="L21">
      <style:paragraph-properties fo:margin-left="0in" fo:margin-right="0in" fo:text-indent="0in" style:auto-text-indent="false" fo:padding="0in" fo:border="none"/>
    </style:style>
    <style:style style:name="P32" style:family="paragraph" style:parent-style-name="Text_20_body" style:list-style-name="L21">
      <style:paragraph-properties fo:margin-left="0in" fo:margin-right="0in" fo:text-indent="0in" style:auto-text-indent="false" fo:padding="0in" fo:border="none"/>
      <style:text-properties officeooo:paragraph-rsid="001f8eff"/>
    </style:style>
    <style:style style:name="P33" style:family="paragraph" style:parent-style-name="Standard">
      <style:paragraph-properties fo:margin-left="0in" fo:margin-right="0in" style:line-height-at-least="0.198in" fo:text-indent="0in" style:auto-text-indent="false"/>
      <style:text-properties fo:color="#bbbebf" loext:opacity="100%" style:font-name="Consolas" fo:font-size="10.5pt" fo:font-weight="normal" officeooo:paragraph-rsid="001f8eff" fo:background-color="#121314"/>
    </style:style>
    <style:style style:name="P34" style:family="paragraph" style:parent-style-name="Standard">
      <style:paragraph-properties style:line-height-at-least="0.198in"/>
      <style:text-properties officeooo:paragraph-rsid="001f8eff"/>
    </style:style>
    <style:style style:name="P35" style:family="paragraph" style:parent-style-name="Text_20_body">
      <style:paragraph-properties fo:margin-left="0in" fo:margin-right="0in" fo:text-indent="0in" style:auto-text-indent="false" fo:padding="0in" fo:border="none"/>
      <style:text-properties officeooo:paragraph-rsid="001f8eff"/>
    </style:style>
    <style:style style:name="P36" style:family="paragraph" style:parent-style-name="Text_20_body" style:list-style-name="L22">
      <style:paragraph-properties fo:margin-left="0in" fo:margin-right="0in" fo:text-indent="0in" style:auto-text-indent="false" fo:padding="0in" fo:border="none"/>
    </style:style>
    <style:style style:name="P37" style:family="paragraph" style:parent-style-name="Text_20_body" style:list-style-name="L23">
      <style:paragraph-properties fo:margin-left="0in" fo:margin-right="0in" fo:text-indent="0in" style:auto-text-indent="false" fo:padding="0in" fo:border="none"/>
    </style:style>
    <style:style style:name="P38" style:family="paragraph" style:parent-style-name="Text_20_body" style:list-style-name="L24">
      <style:paragraph-properties fo:margin-left="0in" fo:margin-right="0in" fo:text-indent="0in" style:auto-text-indent="false" fo:padding="0in" fo:border="none"/>
    </style:style>
    <style:style style:name="P39" style:family="paragraph" style:parent-style-name="Text_20_body" style:list-style-name="L25">
      <style:paragraph-properties fo:margin-left="0in" fo:margin-right="0in" fo:text-indent="0in" style:auto-text-indent="false" fo:padding="0in" fo:border="none"/>
    </style:style>
    <style:style style:name="P40" style:family="paragraph" style:parent-style-name="Text_20_body" style:list-style-name="L26">
      <style:paragraph-properties fo:margin-left="0in" fo:margin-right="0in" fo:text-indent="0in" style:auto-text-indent="false" fo:padding="0in" fo:border="none"/>
    </style:style>
    <style:style style:name="P41" style:family="paragraph" style:parent-style-name="Text_20_body" style:list-style-name="L27">
      <style:paragraph-properties fo:margin-left="0in" fo:margin-right="0in" fo:text-indent="0in" style:auto-text-indent="false" fo:padding="0in" fo:border="none"/>
    </style:style>
    <style:style style:name="P42" style:family="paragraph" style:parent-style-name="Text_20_body" style:list-style-name="L28">
      <style:paragraph-properties fo:margin-left="0in" fo:margin-right="0in" fo:text-indent="0in" style:auto-text-indent="false" fo:padding="0in" fo:border="none"/>
    </style:style>
    <style:style style:name="P43" style:family="paragraph" style:parent-style-name="Text_20_body" style:list-style-name="L29">
      <style:paragraph-properties fo:margin-left="0in" fo:margin-right="0in" fo:text-indent="0in" style:auto-text-indent="false" fo:padding="0in" fo:border="none"/>
    </style:style>
    <style:style style:name="P44" style:family="paragraph" style:parent-style-name="Text_20_body" style:list-style-name="L30">
      <style:paragraph-properties fo:margin-left="0in" fo:margin-right="0in" fo:text-indent="0in" style:auto-text-indent="false" fo:padding="0in" fo:border="none"/>
    </style:style>
    <style:style style:name="P45" style:family="paragraph" style:parent-style-name="Text_20_body" style:list-style-name="L31">
      <style:paragraph-properties fo:margin-left="0in" fo:margin-right="0in" fo:text-indent="0in" style:auto-text-indent="false" fo:padding="0in" fo:border="none"/>
    </style:style>
    <style:style style:name="P46" style:family="paragraph" style:parent-style-name="Text_20_body" style:list-style-name="L32">
      <style:paragraph-properties fo:margin-left="0in" fo:margin-right="0in" fo:text-indent="0in" style:auto-text-indent="false" fo:padding="0in" fo:border="none"/>
    </style:style>
    <style:style style:name="P47" style:family="paragraph" style:parent-style-name="Text_20_body" style:list-style-name="L33">
      <style:paragraph-properties fo:margin-left="0in" fo:margin-right="0in" fo:text-indent="0in" style:auto-text-indent="false" fo:padding="0in" fo:border="none"/>
    </style:style>
    <style:style style:name="P48" style:family="paragraph" style:parent-style-name="Text_20_body" style:list-style-name="L34">
      <style:paragraph-properties fo:margin-left="0in" fo:margin-right="0in" fo:text-indent="0in" style:auto-text-indent="false" fo:padding="0in" fo:border="none"/>
    </style:style>
    <style:style style:name="P49" style:family="paragraph" style:parent-style-name="Text_20_body" style:list-style-name="L35">
      <style:paragraph-properties fo:margin-left="0in" fo:margin-right="0in" fo:text-indent="0in" style:auto-text-indent="false" fo:padding="0in" fo:border="none"/>
    </style:style>
    <style:style style:name="P50" style:family="paragraph" style:parent-style-name="Text_20_body" style:list-style-name="L36">
      <style:paragraph-properties fo:margin-left="0in" fo:margin-right="0in" fo:text-indent="0in" style:auto-text-indent="false" fo:padding="0in" fo:border="none"/>
    </style:style>
    <style:style style:name="P51" style:family="paragraph" style:parent-style-name="Text_20_body" style:list-style-name="L37">
      <style:paragraph-properties fo:margin-left="0in" fo:margin-right="0in" fo:text-indent="0in" style:auto-text-indent="false" fo:padding="0in" fo:border="none"/>
    </style:style>
    <style:style style:name="P52" style:family="paragraph" style:parent-style-name="Text_20_body" style:list-style-name="L38">
      <style:paragraph-properties fo:margin-left="0in" fo:margin-right="0in" fo:text-indent="0in" style:auto-text-indent="false" fo:padding="0in" fo:border="none"/>
    </style:style>
    <style:style style:name="P53" style:family="paragraph" style:parent-style-name="Preformatted_20_Text" style:list-style-name="L38">
      <style:paragraph-properties fo:margin-left="0in" fo:margin-right="0in" fo:line-height="115%" fo:text-indent="0in" style:auto-text-indent="false" fo:padding="0in" fo:border="none"/>
      <style:text-properties loext:padding="0in" loext:border="none"/>
    </style:style>
    <style:style style:name="P54" style:family="paragraph" style:parent-style-name="Preformatted_20_Text" style:list-style-name="L38">
      <style:paragraph-properties fo:margin-left="0in" fo:margin-right="0in" fo:line-height="115%" fo:text-indent="0in" style:auto-text-indent="false" fo:padding="0in" fo:border="none"/>
    </style:style>
    <style:style style:name="P55" style:family="paragraph" style:parent-style-name="Preformatted_20_Text" style:list-style-name="L38">
      <style:paragraph-properties fo:margin-left="0in" fo:margin-right="0in" fo:margin-top="0in" fo:margin-bottom="0.0972in" style:contextual-spacing="false" fo:line-height="115%" fo:text-indent="0in" style:auto-text-indent="false" fo:padding="0in" fo:border="none"/>
    </style:style>
    <style:style style:name="P56" style:family="paragraph" style:parent-style-name="Preformatted_20_Text" style:list-style-name="L38">
      <style:paragraph-properties fo:margin-left="0in" fo:margin-right="0in" fo:margin-top="0in" fo:margin-bottom="0.1965in" style:contextual-spacing="false" fo:line-height="115%" fo:text-indent="0in" style:auto-text-indent="false" fo:padding="0in" fo:border="none"/>
    </style:style>
    <style:style style:name="P57" style:family="paragraph" style:parent-style-name="Text_20_body" style:list-style-name="L39">
      <style:paragraph-properties fo:margin-left="0in" fo:margin-right="0in" fo:text-indent="0in" style:auto-text-indent="false" fo:padding="0in" fo:border="none"/>
    </style:style>
    <style:style style:name="P58" style:family="paragraph" style:parent-style-name="Text_20_body" style:list-style-name="L40">
      <style:paragraph-properties fo:margin-left="0in" fo:margin-right="0in" fo:text-indent="0in" style:auto-text-indent="false" fo:padding="0in" fo:border="none"/>
    </style:style>
    <style:style style:name="P59" style:family="paragraph" style:parent-style-name="Text_20_body" style:list-style-name="L41">
      <style:paragraph-properties fo:margin-left="0in" fo:margin-right="0in" fo:text-indent="0in" style:auto-text-indent="false" fo:padding="0in" fo:border="none"/>
    </style:style>
    <style:style style:name="P60" style:family="paragraph" style:parent-style-name="Text_20_body" style:list-style-name="L42">
      <style:paragraph-properties fo:margin-left="0in" fo:margin-right="0in" fo:text-indent="0in" style:auto-text-indent="false" fo:padding="0in" fo:border="none"/>
    </style:style>
    <style:style style:name="T1" style:family="text">
      <style:text-properties officeooo:rsid="00180f2a" loext:padding="0in" loext:border="none"/>
    </style:style>
    <style:style style:name="T2" style:family="text">
      <style:text-properties loext:padding="0in" loext:border="none"/>
    </style:style>
    <style:style style:name="T3" style:family="text">
      <style:text-properties officeooo:rsid="00180f2a"/>
    </style:style>
    <style:style style:name="T4" style:family="text">
      <style:text-properties officeooo:rsid="001ca042"/>
    </style:style>
    <style:style style:name="T5" style:family="text">
      <style:text-properties officeooo:rsid="001ca042" loext:padding="0in" loext:border="none"/>
    </style:style>
    <style:style style:name="T6" style:family="text">
      <style:text-properties fo:color="#79c0ff" loext:opacity="100%" style:font-name="Consolas" fo:font-size="10.5pt" fo:font-weight="bold" fo:background-color="#121314" loext:char-shading-value="0"/>
    </style:style>
    <style:style style:name="T7" style:family="text">
      <style:text-properties fo:color="#79c0ff" loext:opacity="100%" style:font-name="Consolas" fo:font-size="10.5pt" fo:font-weight="bold" officeooo:rsid="001ca042" fo:background-color="#121314" loext:char-shading-value="0"/>
    </style:style>
    <style:style style:name="T8" style:family="text">
      <style:text-properties fo:color="#79c0ff" loext:opacity="100%"/>
    </style:style>
    <style:style style:name="T9" style:family="text">
      <style:text-properties fo:color="#c9d1d9" loext:opacity="100%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1-experiment-overview-and-objectives"/>1. overview and objectives</text:h>
      <text:list text:style-name="L1">
        <text:list-item>
          <text:p text:style-name="P1"><text:span text:style-name="Strong_20_Emphasis"><text:span text:style-name="T1">G</text:span></text:span><text:span text:style-name="Strong_20_Emphasis"><text:span text:style-name="T2">oal of the </text:span></text:span><text:span text:style-name="Strong_20_Emphasis"><text:span text:style-name="T1">(Jupyter) </text:span></text:span><text:span text:style-name="Strong_20_Emphasis"><text:span text:style-name="T2">notebook/</text:span></text:span><text:span text:style-name="Strong_20_Emphasis"><text:span text:style-name="T1">program</text:span></text:span><text:span text:style-name="Strong_20_Emphasis"><text:span text:style-name="T2">.</text:span></text:span><text:line-break/><text:span text:style-name="T3">I</text:span> want to build and compare several machine learning models to predict the <text:span text:style-name="Strong_20_Emphasis"><text:span text:style-name="T2">1‑month direction</text:span></text:span> of stock prices (buy / hold / sell) using engineered features derived from daily OHLCV data for many symbols over the last 6 years.</text:p>
        </text:list-item>
        <text:list-item>
          <text:p text:style-name="P1"><text:span text:style-name="Strong_20_Emphasis"><text:span text:style-name="T1">P</text:span></text:span><text:span text:style-name="Strong_20_Emphasis"><text:span text:style-name="T2">rediction target.</text:span></text:span><text:line-break/><text:span text:style-name="T3">T</text:span>he model will predict a 3-class label (<text:span text:style-name="Source_20_Text"><text:span text:style-name="T2">buy</text:span></text:span>, <text:span text:style-name="Source_20_Text"><text:span text:style-name="T2">hold</text:span></text:span>, <text:span text:style-name="Source_20_Text"><text:span text:style-name="T2">sell</text:span></text:span>) based on features computed from past prices and volumes, where the label is defined from the <text:span text:style-name="Strong_20_Emphasis"><text:span text:style-name="T2">forward 20‑trading‑day return</text:span></text:span>.</text:p>
        </text:list-item>
        <text:list-item>
          <text:p text:style-name="P1"><text:span text:style-name="Strong_20_Emphasis"><text:span text:style-name="T2">key design decisions.</text:span></text:span></text:p>
          <text:list>
            <text:list-item>
              <text:p text:style-name="P1">Use of <text:span text:style-name="Strong_20_Emphasis"><text:span text:style-name="T2">last 6 years</text:span></text:span> of data (rolling window)</text:p>
            </text:list-item>
            <text:list-item>
              <text:p text:style-name="P1"><text:span text:style-name="Strong_20_Emphasis"><text:span text:style-name="T2">Time-aware splits</text:span></text:span> (no shuffling)</text:p>
            </text:list-item>
            <text:list-item>
              <text:p text:style-name="P1">Pooled data across a broad index universe, filtered for data quality</text:p>
            </text:list-item>
            <text:list-item>
              <text:p text:style-name="P1">Benchmark models: Logistic Regression, Random Forest, Extra Trees, HistGradientBoosting</text:p>
            </text:list-item>
            <text:list-item>
              <text:p text:style-name="P1">Primary metric: <text:span text:style-name="Strong_20_Emphasis"><text:span text:style-name="T2">macro F1</text:span></text:span> and class-wise performance for buy/sell</text:p>
            </text:list-item>
          </text:list>
        </text:list-item>
      </text:list>
      <text:p text:style-name="Horizontal_20_Line"/>
      <text:h text:style-name="P2" text:outline-level="2"><text:bookmark text:name="2-data-sources-universe-and-time-horizon"/>2. Data<text:span text:style-name="T4">set</text:span></text:h>
      <text:list text:style-name="L2">
        <text:list-item>
          <text:p text:style-name="P3"><text:span text:style-name="Strong_20_Emphasis"><text:span text:style-name="T5">The dataset is already prepared and ready to be used</text:span></text:span></text:p>
        </text:list-item>
        <text:list-item>
          <text:p text:style-name="P3"><text:span text:style-name="Strong_20_Emphasis"><text:span text:style-name="T5">it is a parquet file stored in 1‑month-direction-classifier/2_prepare_data</text:span></text:span><text:span text:style-name="Strong_20_Emphasis"><text:span text:style-name="T2">.</text:span></text:span></text:p>
        </text:list-item>
        <text:list-item>
          <text:p text:style-name="P3"><text:span text:style-name="Strong_20_Emphasis"><text:span text:style-name="T5">It is loaded as a variable, so the user can configure it and change as needed.</text:span></text:span></text:p>
        </text:list-item>
        <text:list-item>
          <text:p text:style-name="P3"><text:span text:style-name="Strong_20_Emphasis"><text:span text:style-name="T5">It has the following columns / features</text:span></text:span></text:p>
        </text:list-item>
      </text:list>
      <text:p text:style-name="P4"><text:span text:style-name="Strong_20_Emphasis"><text:span text:style-name="T5"/></text:span></text:p>
      <text:p text:style-name="P5"><text:span text:style-name="T6">## </text:span><text:span text:style-name="T7">2</text:span><text:span text:style-name="T6">.1 Raw Column Definitions</text:span></text:p>
      <text:p text:style-name="P6"/>
      <text:p text:style-name="P7">| Column | Full Name | Description |</text:p>
      <text:p text:style-name="P7">|---|---|---|</text:p>
      <text:p text:style-name="P7">| <text:span text:style-name="T8">`symbol`</text:span> | Ticker Symbol | Ticker from universe CSV, standardised for joins (e.g. <text:span text:style-name="T8">`AMZN.US`</text:span>). |</text:p>
      <text:p text:style-name="P7">| <text:span text:style-name="T8">`date`</text:span> | Trading Date | Calendar date of the trading session. |</text:p>
      <text:p text:style-name="P7">| <text:span text:style-name="T8">`open`</text:span> | Open Price | Price at market open. |</text:p>
      <text:p text:style-name="P7">| <text:span text:style-name="T8">`high`</text:span> | High Price | Highest intraday price. |</text:p>
      <text:p text:style-name="P7">| <text:span text:style-name="T8">`low`</text:span> | Low Price | Lowest intraday price. |</text:p>
      <text:p text:style-name="P7">| <text:span text:style-name="T8">`close`</text:span> | Close Price | Price at market close. |</text:p>
      <text:p text:style-name="P7">| <text:span text:style-name="T8">`adj_close`</text:span> | Adjusted Close | Close price adjusted for splits and dividends. |</text:p>
      <text:p text:style-name="P7">| <text:span text:style-name="T8">`volume`</text:span> | Volume | Number of shares traded. |</text:p>
      <text:p text:style-name="P6"/>
      <text:p text:style-name="P7"><text:span text:style-name="T9">**Outputs**</text:span>: Rendered Markdown table (no code cell needed for this sub-section).</text:p>
      <text:p text:style-name="P7"><text:soft-page-break/></text:p>
      <text:p text:style-name="P8">## 2.2 Engineered Feature and Target Definitions</text:p>
      <text:p text:style-name="P6"/>
      <text:p text:style-name="P7">| Variable | Full Name | Formula | Description |</text:p>
      <text:p text:style-name="P7">|---|---|---|---|</text:p>
      <text:p text:style-name="P7">| <text:span text:style-name="T8">`ret_1d`</text:span> | 1-Day Return | <text:span text:style-name="T8">`close_t / close_{t-1} - 1`</text:span> | Daily simple return. |</text:p>
      <text:p text:style-name="P7">| <text:span text:style-name="T8">`log_ret_1d`</text:span> | 1-Day Log Return | <text:span text:style-name="T8">`ln(close_t / close_{t-1})`</text:span> | Daily log return. |</text:p>
      <text:p text:style-name="P7">| <text:span text:style-name="T8">`tr_range`</text:span> | Intraday Range | <text:span text:style-name="T8">`high_t - low_t`</text:span> | Simple high-low spread. |</text:p>
      <text:p text:style-name="P7">| <text:span text:style-name="T8">`true_range`</text:span> | True Range | <text:span text:style-name="T8">`max(high_t - low_t, \|high_t - close_{t-1}\|, \|low_t - close_{t-1}\|)`</text:span> | Wilder's true range accounting for gaps. |</text:p>
      <text:p text:style-name="P7">| <text:span text:style-name="T8">`ret_5d`</text:span> | 5-Day Return | <text:span text:style-name="T8">`close_t / close_{t-5} - 1`</text:span> | 5-day price change. |</text:p>
      <text:p text:style-name="P7">| <text:span text:style-name="T8">`ret_10d`</text:span> | 10-Day Return | <text:span text:style-name="T8">`close_t / close_{t-10} - 1`</text:span> | 10-day price change. |</text:p>
      <text:p text:style-name="P7">| <text:span text:style-name="T8">`ret_20d`</text:span> | 20-Day Return | <text:span text:style-name="T8">`close_t / close_{t-20} - 1`</text:span> | Approx. 1-month price change. |</text:p>
      <text:p text:style-name="P7">| <text:span text:style-name="T8">`ret_60d`</text:span> | 60-Day Return | <text:span text:style-name="T8">`close_t / close_{t-60} - 1`</text:span> | Approx. 3-month price change. |</text:p>
      <text:p text:style-name="P7">| <text:span text:style-name="T8">`log_ret_5d`</text:span> | 5-Day Log Return | <text:span text:style-name="T8">`ln(close_t / close_{t-5})`</text:span> | 5-day log return. |</text:p>
      <text:p text:style-name="P7">| <text:span text:style-name="T8">`log_ret_20d`</text:span> | 20-Day Log Return | <text:span text:style-name="T8">`ln(close_t / close_{t-20})`</text:span> | 20-day log return. |</text:p>
      <text:p text:style-name="P7">| <text:span text:style-name="T8">`sma_5`</text:span> | 5-Day SMA | <text:span text:style-name="T8">`mean(close, 5)`</text:span> | Short-term trend. |</text:p>
      <text:p text:style-name="P7">| <text:span text:style-name="T8">`sma_20`</text:span> | 20-Day SMA | <text:span text:style-name="T8">`mean(close, 20)`</text:span> | Short-to-medium trend. |</text:p>
      <text:p text:style-name="P7">| <text:span text:style-name="T8">`sma_50`</text:span> | 50-Day SMA | <text:span text:style-name="T8">`mean(close, 50)`</text:span> | Medium-term trend. |</text:p>
      <text:p text:style-name="P7">| <text:span text:style-name="T8">`sma_200`</text:span> | 200-Day SMA | <text:span text:style-name="T8">`mean(close, 200)`</text:span> | Long-term trend. |</text:p>
      <text:p text:style-name="P7">| <text:span text:style-name="T8">`close_over_sma_20`</text:span> | Close / SMA20 | <text:span text:style-name="T8">`close_t / sma_20_t`</text:span> | Relative position to short trend. |</text:p>
      <text:p text:style-name="P7">| <text:span text:style-name="T8">`close_over_sma_50`</text:span> | Close / SMA50 | <text:span text:style-name="T8">`close_t / sma_50_t`</text:span> | Relative position to medium trend. |</text:p>
      <text:p text:style-name="P7">| <text:span text:style-name="T8">`close_over_sma_200`</text:span> | Close / SMA200 | <text:span text:style-name="T8">`close_t / sma_200_t`</text:span> | Relative position to long trend. |</text:p>
      <text:p text:style-name="P7">| <text:span text:style-name="T8">`sma_20_slope_5d`</text:span> | SMA20 5-Day Slope | <text:span text:style-name="T8">`sma_20_t / sma_20_{t-5} - 1`</text:span> | Momentum of the 20-day average. |</text:p>
      <text:p text:style-name="P7">| <text:span text:style-name="T8">`sma_50_slope_5d`</text:span> | SMA50 5-Day Slope | <text:span text:style-name="T8">`sma_50_t / sma_50_{t-5} - 1`</text:span> | Momentum of the 50-day average. |</text:p>
      <text:p text:style-name="P7">| <text:span text:style-name="T8">`vol_ret_5d`</text:span> | Return Volatility 5D | <text:span text:style-name="T8">`std(ret_1d, 5)`</text:span> | Short-term return volatility. |</text:p>
      <text:p text:style-name="P7">| <text:span text:style-name="T8">`vol_ret_20d`</text:span> | Return Volatility 20D | <text:span text:style-name="T8">`std(ret_1d, 20)`</text:span> | Medium-term return volatility. |</text:p>
      <text:p text:style-name="P7">| <text:span text:style-name="T8">`vol_ret_60d`</text:span> | Return Volatility 60D | <text:span text:style-name="T8">`std(ret_1d, 60)`</text:span> | Long-term return volatility. |</text:p>
      <text:p text:style-name="P7">| <text:span text:style-name="T8">`vol_tr_5d`</text:span> | True Range Volatility 5D | <text:span text:style-name="T8">`std(true_range, 5)`</text:span> | Short-term price range volatility. |</text:p>
      <text:p text:style-name="P7">| <text:span text:style-name="T8">`vol_tr_20d`</text:span> | True Range Volatility 20D | <text:span text:style-name="T8">`std(true_range, 20)`</text:span> | Medium-term price range volatility. |</text:p>
      <text:p text:style-name="P7">| <text:span text:style-name="T8">`value_traded`</text:span> | Daily Value Traded | <text:span text:style-name="T8">`close_t * volume_t`</text:span> | Proxy for daily liquidity. |</text:p>
      <text:p text:style-name="P7">| <text:span text:style-name="T8">`vol_ma_20`</text:span> | Volume MA 20D | <text:span text:style-name="T8">`mean(volume, 20)`</text:span> | Average volume over 20 days. |</text:p>
      <text:p text:style-name="P7">| <text:span text:style-name="T8">`vol_ma_60`</text:span> | Volume MA 60D | <text:span text:style-name="T8">`mean(volume, 60)`</text:span> | Average volume over 60 days. |</text:p>
      <text:p text:style-name="P7">| <text:span text:style-name="T8">`vol_rel_20`</text:span> | Relative Volume 20D | <text:span text:style-name="T8">`volume_t / vol_ma_20_t`</text:span> | Today's volume relative to 20-day average. |</text:p>
      <text:p text:style-name="P7"><text:soft-page-break/>| <text:span text:style-name="T8">`value_traded_ma_20`</text:span> | Value Traded MA 20D | <text:span text:style-name="T8">`mean(value_traded, 20)`</text:span> | Smoothed liquidity measure. |</text:p>
      <text:p text:style-name="P7">| <text:span text:style-name="T8">`value_traded_rel_20`</text:span> | Relative Value Traded 20D | <text:span text:style-name="T8">`value_traded_t / value_traded_ma_20_t`</text:span> | Today's liquidity relative to 20-day average. |</text:p>
      <text:p text:style-name="P7">| <text:span text:style-name="T8">`rsi_14`</text:span> | RSI 14 | Wilder RSI of <text:span text:style-name="T8">`close`</text:span>, 14-day | Momentum oscillator (0–100). |</text:p>
      <text:p text:style-name="P7">| <text:span text:style-name="T8">`macd`</text:span> | MACD Line | <text:span text:style-name="T8">`EMA_12(close) - EMA_26(close)`</text:span> | Trend-following momentum indicator. |</text:p>
      <text:p text:style-name="P7">| <text:span text:style-name="T8">`macd_signal`</text:span> | MACD Signal Line | <text:span text:style-name="T8">`EMA_9(macd)`</text:span> | Smoothed MACD for crossover signals. |</text:p>
      <text:p text:style-name="P7">| <text:span text:style-name="T8">`macd_hist`</text:span> | MACD Histogram | <text:span text:style-name="T8">`macd - macd_signal`</text:span> | Distance between MACD and signal. |</text:p>
      <text:p text:style-name="P7">| <text:span text:style-name="T8">`atr_14`</text:span> | ATR 14 | Wilder EMA of <text:span text:style-name="T8">`true_range`</text:span>, 14-day | Average true range normalised volatility. |</text:p>
      <text:p text:style-name="P7">| <text:span text:style-name="T8">`hh_20d`</text:span> | 20-Day Highest High | <text:span text:style-name="T8">`max(high, 20)`</text:span> | Rolling resistance level. |</text:p>
      <text:p text:style-name="P7">| <text:span text:style-name="T8">`ll_20d`</text:span> | 20-Day Lowest Low | <text:span text:style-name="T8">`min(low, 20)`</text:span> | Rolling support level. |</text:p>
      <text:p text:style-name="P7">| <text:span text:style-name="T8">`dist_from_20d_high`</text:span> | Distance from 20D High | <text:span text:style-name="T8">`(close_t / hh_20d_t) - 1`</text:span> | Negative: below recent high. |</text:p>
      <text:p text:style-name="P7">| <text:span text:style-name="T8">`dist_from_20d_low`</text:span> | Distance from 20D Low | <text:span text:style-name="T8">`(close_t / ll_20d_t) - 1`</text:span> | Positive: above recent low. |</text:p>
      <text:p text:style-name="P7">| <text:span text:style-name="T8">`fwd_ret_20d`</text:span> | Forward 20-Day Return | <text:span text:style-name="T8">`close_{t+20} / close_t - 1`</text:span> | Target precursor — future return. |</text:p>
      <text:p text:style-name="P7">| <text:span text:style-name="T8">`label`</text:span> | Direction Label | <text:span text:style-name="T8">`buy`</text:span> / <text:span text:style-name="T8">`sell`</text:span> / <text:span text:style-name="T8">`hold`</text:span> | <text:span text:style-name="T8">`buy`</text:span> if <text:span text:style-name="T8">`fwd_ret_20d &gt; 0.05`</text:span>, <text:span text:style-name="T8">`sell`</text:span> if <text:span text:style-name="T8">`&lt; -0.05`</text:span>, else <text:span text:style-name="T8">`hold`</text:span>. |</text:p>
      <text:p text:style-name="P7"/>
      <text:p text:style-name="P4"><text:span text:style-name="Strong_20_Emphasis"><text:span text:style-name="T5"/></text:span></text:p>
      <text:h text:style-name="P2" text:outline-level="2"><text:bookmark text:name="7-trainvalidationtest-splitting-time-aware"/>7. Train/validation/test splitting (time-aware)</text:h>
      <text:h text:style-name="P2" text:outline-level="2"><text:bookmark text:name="71-chronological-splitting-strategy"/>7.1 Chronological splitting strategy</text:h>
      <text:list text:continue-numbering="true" text:style-name="L2">
        <text:list-item>
          <text:p text:style-name="P9"><text:span text:style-name="Strong_20_Emphasis"><text:span text:style-name="T2">time-aware splitting is needed.</text:span></text:span></text:p>
          <text:list>
            <text:list-item>
              <text:p text:style-name="P9">Prevents future information leakage</text:p>
            </text:list-item>
          </text:list>
        </text:list-item>
        <text:list-item>
          <text:p text:style-name="P9"><text:span text:style-name="Strong_20_Emphasis"><text:span text:style-name="T2">Define the splits.</text:span></text:span></text:p>
          <text:list>
            <text:list-item>
              <text:p text:style-name="P9">Sort all rows by <text:span text:style-name="Source_20_Text"><text:span text:style-name="T2">date</text:span></text:span> (and <text:span text:style-name="Source_20_Text"><text:span text:style-name="T2">symbol</text:span></text:span> if needed for stability)</text:p>
            </text:list-item>
            <text:list-item>
              <text:p text:style-name="P9">Choose split dates so that:</text:p>
              <text:list>
                <text:list-item>
                  <text:p text:style-name="P9">Training set: earliest ~70% of the time span</text:p>
                </text:list-item>
                <text:list-item>
                  <text:p text:style-name="P9">Validation set: next ~15%</text:p>
                </text:list-item>
                <text:list-item>
                  <text:p text:style-name="P9">Test set: most recent ~15%</text:p>
                </text:list-item>
              </text:list>
            </text:list-item>
          </text:list>
        </text:list-item>
        <text:list-item>
          <text:p text:style-name="P9"><text:span text:style-name="Strong_20_Emphasis"><text:span text:style-name="T2">Record actual date cutoffs.</text:span></text:span></text:p>
          <text:list>
            <text:list-item>
              <text:p text:style-name="P9">E.g. training up to 2019‑12‑31, validation 2020–2021, test 2022–2023 (just as an example depending on actual dates)</text:p>
            </text:list-item>
          </text:list>
        </text:list-item>
      </text:list>
      <text:h text:style-name="P2" text:outline-level="2"><text:bookmark text:name="72-timeseriessplit-for-tuning"/><text:soft-page-break/>7.2 TimeSeriesSplit for tuning</text:h>
      <text:list text:style-name="L3">
        <text:list-item>
          <text:p text:style-name="P10"><text:span text:style-name="Strong_20_Emphasis"><text:span text:style-name="T2">internal cross-validation.</text:span></text:span></text:p>
          <text:list>
            <text:list-item>
              <text:p text:style-name="P10">Within the combined training+validation period, <text:s/>use <text:span text:style-name="Source_20_Text"><text:span text:style-name="T2">TimeSeriesSplit</text:span></text:span> (e.g. 4–5 splits) for hyperparameter tuning.</text:p>
            </text:list-item>
          </text:list>
        </text:list-item>
        <text:list-item>
          <text:p text:style-name="P10"><text:span text:style-name="Strong_20_Emphasis"><text:span text:style-name="T2">usage.</text:span></text:span></text:p>
          <text:list>
            <text:list-item>
              <text:p text:style-name="P10">Final test set remains untouched until the very end.</text:p>
            </text:list-item>
            <text:list-item>
              <text:p text:style-name="P10"><text:span text:style-name="Source_20_Text"><text:span text:style-name="T2">TimeSeriesSplit</text:span></text:span> ensures each fold respects chronology.</text:p>
            </text:list-item>
          </text:list>
        </text:list-item>
      </text:list>
      <text:p text:style-name="Horizontal_20_Line"/>
      <text:h text:style-name="P2" text:outline-level="2"><text:bookmark text:name="8-feature-scaling--preprocessing-strategy"/>8. Feature scaling / preprocessing strategy</text:h>
      <text:h text:style-name="P2" text:outline-level="2"><text:bookmark text:name="81-which-models-need-scaling"/>8.1 Which models need scaling</text:h>
      <text:list text:style-name="L4">
        <text:list-item>
          <text:p text:style-name="P11"><text:span text:style-name="Strong_20_Emphasis"><text:span text:style-name="T2">scaling needs.</text:span></text:span></text:p>
          <text:list>
            <text:list-item>
              <text:p text:style-name="P11">Logistic Regression, Linear SVM, MLP: require feature scaling</text:p>
            </text:list-item>
            <text:list-item>
              <text:p text:style-name="P11">Tree-based models (RF, Extra Trees, HistGB) generally do <text:span text:style-name="Strong_20_Emphasis"><text:span text:style-name="T2">not</text:span></text:span> need scaling and may work better on raw features</text:p>
            </text:list-item>
          </text:list>
        </text:list-item>
        <text:list-item>
          <text:p text:style-name="P11"><text:span text:style-name="Strong_20_Emphasis"><text:span text:style-name="T2">transformation approach.</text:span></text:span></text:p>
          <text:list>
            <text:list-item>
              <text:p text:style-name="P11">For scaling, use e.g. <text:span text:style-name="Source_20_Text"><text:span text:style-name="T2">StandardScaler</text:span></text:span> fitted on training data only, applied to validation/test.</text:p>
            </text:list-item>
          </text:list>
        </text:list-item>
      </text:list>
      <text:h text:style-name="P2" text:outline-level="2"><text:bookmark text:name="82-preprocessing-pipelines"/>8.2 Preprocessing pipelines</text:h>
      <text:list text:style-name="L5">
        <text:list-item>
          <text:p text:style-name="P12"><text:span text:style-name="Strong_20_Emphasis"><text:span text:style-name="T2">use of sklearn Pipelines.</text:span></text:span></text:p>
          <text:list>
            <text:list-item>
              <text:p text:style-name="P12">Build pipelines combining scaling (where needed) and the model</text:p>
            </text:list-item>
            <text:list-item>
              <text:p text:style-name="P12">Ensures no data leakage and consistent preprocessing across splits</text:p>
            </text:list-item>
          </text:list>
        </text:list-item>
      </text:list>
      <text:p text:style-name="Horizontal_20_Line"/>
      <text:h text:style-name="P2" text:outline-level="2"><text:bookmark text:name="9-baseline-and-candidate-models"/>9. Baseline and candidate models</text:h>
      <text:h text:style-name="P2" text:outline-level="2"><text:bookmark text:name="91-baseline-simple-strategy"/>9.1 Baseline: simple strategy</text:h>
      <text:list text:style-name="L6">
        <text:list-item>
          <text:p text:style-name="P13"><text:span text:style-name="Strong_20_Emphasis"><text:span text:style-name="T2">Define a trivial baseline for comparison.</text:span></text:span><text:line-break/>Examples:</text:p>
          <text:list>
            <text:list-item>
              <text:p text:style-name="P13">Always predict <text:span text:style-name="Source_20_Text"><text:span text:style-name="T2">hold</text:span></text:span></text:p>
            </text:list-item>
            <text:list-item>
              <text:p text:style-name="P13">Always predict the majority class in the training set</text:p>
            </text:list-item>
            <text:list-item>
              <text:p text:style-name="P13">Simple rule-based: if <text:span text:style-name="Source_20_Text"><text:span text:style-name="T2">ret_20d</text:span></text:span> &gt; 0 then buy else sell</text:p>
            </text:list-item>
          </text:list>
        </text:list-item>
        <text:list-item>
          <text:p text:style-name="P13">Ensures that ML models outperform naive rules.</text:p>
        </text:list-item>
      </text:list>
      <text:h text:style-name="P2" text:outline-level="2"><text:bookmark text:name="92-candidate-models-shortlist"/><text:soft-page-break/>9.2 Candidate models shortlist</text:h>
      <text:list text:style-name="L7">
        <text:list-item>
          <text:p text:style-name="P14"><text:span text:style-name="Strong_20_Emphasis"><text:span text:style-name="T2">the models to compare.</text:span></text:span></text:p>
          <text:list>
            <text:list-item>
              <text:p text:style-name="P14"><text:span text:style-name="Source_20_Text"><text:span text:style-name="T2">LogisticRegression</text:span></text:span> (multinomial)</text:p>
            </text:list-item>
            <text:list-item>
              <text:p text:style-name="P14"><text:span text:style-name="Source_20_Text"><text:span text:style-name="T2">RandomForestClassifier</text:span></text:span></text:p>
            </text:list-item>
            <text:list-item>
              <text:p text:style-name="P14"><text:span text:style-name="Source_20_Text"><text:span text:style-name="T2">ExtraTreesClassifier</text:span></text:span></text:p>
            </text:list-item>
            <text:list-item>
              <text:p text:style-name="P14"><text:span text:style-name="Source_20_Text"><text:span text:style-name="T2">HistGradientBoostingClassifier</text:span></text:span></text:p>
            </text:list-item>
            <text:list-item>
              <text:p text:style-name="P14"><text:span text:style-name="Source_20_Text"><text:span text:style-name="T2">LinearSVC</text:span></text:span></text:p>
            </text:list-item>
            <text:list-item>
              <text:p text:style-name="P14"><text:span text:style-name="Source_20_Text"><text:span text:style-name="T2">MLPClassifier</text:span></text:span></text:p>
            </text:list-item>
          </text:list>
        </text:list-item>
        <text:list-item>
          <text:p text:style-name="P14"><text:span text:style-name="Strong_20_Emphasis"><text:span text:style-name="T2">all are from scikit-learn.</text:span></text:span><text:line-break/>start with default-ish settings then tune.</text:p>
        </text:list-item>
      </text:list>
      <text:h text:style-name="P2" text:outline-level="2"><text:bookmark text:name="93-model-specific-notes"/>9.3 Model-specific notes</text:h>
      <text:list text:style-name="L8">
        <text:list-item>
          <text:p text:style-name="P15"><text:span text:style-name="Strong_20_Emphasis"><text:span text:style-name="T2">Logistic Regression.</text:span></text:span></text:p>
          <text:list>
            <text:list-item>
              <text:p text:style-name="P15">Multinomial, regularization parameter C, class weights</text:p>
            </text:list-item>
          </text:list>
        </text:list-item>
        <text:list-item>
          <text:p text:style-name="P15"><text:span text:style-name="Strong_20_Emphasis"><text:span text:style-name="T2">Random Forest &amp; Extra Trees.</text:span></text:span></text:p>
          <text:list>
            <text:list-item>
              <text:p text:style-name="P15">Number of trees, max depth, min samples per leaf, class weight</text:p>
            </text:list-item>
          </text:list>
        </text:list-item>
        <text:list-item>
          <text:p text:style-name="P15"><text:span text:style-name="Strong_20_Emphasis"><text:span text:style-name="T2">HistGradientBoosting.</text:span></text:span></text:p>
          <text:list>
            <text:list-item>
              <text:p text:style-name="P15">Learning rate, max depth/max leaf nodes, number of iterations, regularization</text:p>
            </text:list-item>
          </text:list>
        </text:list-item>
      </text:list>
      <text:p text:style-name="Horizontal_20_Line"/>
      <text:h text:style-name="P2" text:outline-level="2"><text:bookmark text:name="10-evaluation-metrics-and-reporting"/>10. Evaluation metrics and reporting</text:h>
      <text:h text:style-name="P2" text:outline-level="2"><text:bookmark text:name="101-core-metrics"/>10.1 Core metrics</text:h>
      <text:list text:style-name="L9">
        <text:list-item>
          <text:p text:style-name="P16"><text:span text:style-name="Strong_20_Emphasis"><text:span text:style-name="T2">Primary metrics.</text:span></text:span></text:p>
          <text:list>
            <text:list-item>
              <text:p text:style-name="P16">Macro F1 score (treats all classes equally)</text:p>
            </text:list-item>
            <text:list-item>
              <text:p text:style-name="P16">Weighted F1 score</text:p>
            </text:list-item>
          </text:list>
        </text:list-item>
        <text:list-item>
          <text:p text:style-name="P16"><text:span text:style-name="Strong_20_Emphasis"><text:span text:style-name="T2">Class-wise metrics.</text:span></text:span></text:p>
          <text:list>
            <text:list-item>
              <text:p text:style-name="P16">Precision, recall, F1 for each of <text:span text:style-name="Source_20_Text"><text:span text:style-name="T2">buy</text:span></text:span>, <text:span text:style-name="Source_20_Text"><text:span text:style-name="T2">hold</text:span></text:span>, <text:span text:style-name="Source_20_Text"><text:span text:style-name="T2">sell</text:span></text:span></text:p>
            </text:list-item>
            <text:list-item>
              <text:p text:style-name="P16">Especially focus on <text:span text:style-name="Source_20_Text"><text:span text:style-name="T2">buy</text:span></text:span> and <text:span text:style-name="Source_20_Text"><text:span text:style-name="T2">sell</text:span></text:span> performance, since those drive actions.</text:p>
            </text:list-item>
          </text:list>
        </text:list-item>
      </text:list>
      <text:h text:style-name="P2" text:outline-level="2"><text:bookmark text:name="102-additional-diagnostics"/>10.2 Additional diagnostics</text:h>
      <text:list text:style-name="L10">
        <text:list-item>
          <text:p text:style-name="P17"><text:span text:style-name="Strong_20_Emphasis"><text:span text:style-name="T2">Confusion matrices.</text:span></text:span></text:p>
          <text:list>
            <text:list-item>
              <text:p text:style-name="P17">For validation and final test</text:p>
            </text:list-item>
          </text:list>
        </text:list-item>
        <text:list-item>
          <text:p text:style-name="P17"><text:soft-page-break/><text:span text:style-name="Strong_20_Emphasis"><text:span text:style-name="T2">Balanced accuracy.</text:span></text:span></text:p>
          <text:list>
            <text:list-item>
              <text:p text:style-name="P17">To account for class imbalance</text:p>
            </text:list-item>
          </text:list>
        </text:list-item>
      </text:list>
      <text:h text:style-name="P2" text:outline-level="2"><text:bookmark text:name="103-simple-strategy-level-check-optional"/>10.3 Simple strategy-level check (optional)</text:h>
      <text:list text:style-name="L11">
        <text:list-item>
          <text:p text:style-name="P18"><text:span text:style-name="Strong_20_Emphasis"><text:span text:style-name="T2">basic backtest sketch.</text:span></text:span></text:p>
          <text:list>
            <text:list-item>
              <text:p text:style-name="P18">For each day in test set, convert predicted label into an action: long / flat / short </text:p>
            </text:list-item>
            <text:list-item>
              <text:p text:style-name="P18">Track cumulative returns with simple assumptions (no transaction costs at first)</text:p>
            </text:list-item>
          </text:list>
        </text:list-item>
        <text:list-item>
          <text:p text:style-name="P18"><text:span text:style-name="Strong_20_Emphasis"><text:span text:style-name="T2">this is a rough diagnostic, not a full trading simulation.</text:span></text:span></text:p>
        </text:list-item>
      </text:list>
      <text:p text:style-name="Horizontal_20_Line"/>
      <text:h text:style-name="P2" text:outline-level="2"><text:bookmark text:name="11-model-training-and-comparison-workflow"/>11. Model training and comparison workflow</text:h>
      <text:h text:style-name="P2" text:outline-level="2"><text:bookmark text:name="111-first-pass-training-with-default-ish-hyperpara"/>11.1 First-pass training with default-ish hyperparameters</text:h>
      <text:list text:style-name="L12">
        <text:list-item>
          <text:p text:style-name="P19"><text:span text:style-name="Strong_20_Emphasis"><text:span text:style-name="T2">Describe initial fit.</text:span></text:span></text:p>
          <text:list>
            <text:list-item>
              <text:p text:style-name="P19">Train each candidate model on the training set (with proper preprocessing pipeline)</text:p>
            </text:list-item>
            <text:list-item>
              <text:p text:style-name="P19">Evaluate on validation set using the chosen metrics</text:p>
            </text:list-item>
          </text:list>
        </text:list-item>
        <text:list-item>
          <text:p text:style-name="P19"><text:span text:style-name="Strong_20_Emphasis"><text:span text:style-name="T2">Goal of this step.</text:span></text:span></text:p>
          <text:list>
            <text:list-item>
              <text:p text:style-name="P19">Identify which models are promising before investing time in tuning.</text:p>
            </text:list-item>
          </text:list>
        </text:list-item>
      </text:list>
      <text:h text:style-name="P2" text:outline-level="2"><text:bookmark text:name="112-hyperparameter-tuning-for-top-models"/>11.2 Hyperparameter tuning for top models</text:h>
      <text:list text:style-name="L13">
        <text:list-item>
          <text:p text:style-name="P20"><text:span text:style-name="Strong_20_Emphasis"><text:span text:style-name="T2">Select top 2 models based on validation performance.</text:span></text:span></text:p>
        </text:list-item>
        <text:list-item>
          <text:p text:style-name="P20"><text:span text:style-name="Strong_20_Emphasis"><text:span text:style-name="T2">tuning approach.</text:span></text:span></text:p>
          <text:list>
            <text:list-item>
              <text:p text:style-name="P20">Use time-series aware CV (via <text:span text:style-name="Source_20_Text"><text:span text:style-name="T2">TimeSeriesSplit</text:span></text:span>) on training+validation</text:p>
            </text:list-item>
            <text:list-item>
              <text:p text:style-name="P20">Use a moderate search: e.g. <text:span text:style-name="Source_20_Text"><text:span text:style-name="T2">RandomizedSearchCV</text:span></text:span> or small <text:span text:style-name="Source_20_Text"><text:span text:style-name="T2">GridSearchCV</text:span></text:span></text:p>
            </text:list-item>
          </text:list>
        </text:list-item>
        <text:list-item>
          <text:p text:style-name="P20"><text:span text:style-name="Strong_20_Emphasis"><text:span text:style-name="T2">parameter grids.</text:span></text:span></text:p>
          <text:list>
            <text:list-item>
              <text:p text:style-name="P20">For example (high-level description, no code):</text:p>
              <text:list>
                <text:list-item>
                  <text:p text:style-name="P20">Random Forest: <text:span text:style-name="Source_20_Text"><text:span text:style-name="T2">n_estimators</text:span></text:span>, <text:span text:style-name="Source_20_Text"><text:span text:style-name="T2">max_depth</text:span></text:span>, <text:span text:style-name="Source_20_Text"><text:span text:style-name="T2">min_samples_leaf</text:span></text:span>, <text:span text:style-name="Source_20_Text"><text:span text:style-name="T2">max_features</text:span></text:span></text:p>
                </text:list-item>
                <text:list-item>
                  <text:p text:style-name="P20">HistGB: <text:span text:style-name="Source_20_Text"><text:span text:style-name="T2">learning_rate</text:span></text:span>, <text:span text:style-name="Source_20_Text"><text:span text:style-name="T2">max_depth</text:span></text:span>/<text:span text:style-name="Source_20_Text"><text:span text:style-name="T2">max_leaf_nodes</text:span></text:span>, <text:span text:style-name="Source_20_Text"><text:span text:style-name="T2">max_iter</text:span></text:span>, regularization params</text:p>
                </text:list-item>
              </text:list>
            </text:list-item>
          </text:list>
        </text:list-item>
      </text:list>
      <text:h text:style-name="P2" text:outline-level="2"><text:bookmark text:name="113-final-model-selection"/>11.3 Final model selection</text:h>
      <text:list text:style-name="L14">
        <text:list-item>
          <text:p text:style-name="P21"><text:span text:style-name="Strong_20_Emphasis"><text:span text:style-name="T2">choose the final model.</text:span></text:span></text:p>
          <text:list>
            <text:list-item>
              <text:p text:style-name="P21">Compare tuned models on validation metrics and stability across folds</text:p>
            </text:list-item>
            <text:list-item>
              <text:p text:style-name="P21"><text:soft-page-break/>Also consider complexity and training time</text:p>
            </text:list-item>
          </text:list>
        </text:list-item>
        <text:list-item>
          <text:p text:style-name="P21"><text:span text:style-name="Strong_20_Emphasis"><text:span text:style-name="T2">Freeze the chosen model and parameters.</text:span></text:span></text:p>
        </text:list-item>
      </text:list>
      <text:p text:style-name="Horizontal_20_Line"/>
      <text:h text:style-name="P2" text:outline-level="2"><text:bookmark text:name="12-final-evaluation-on-hold-out-test-set"/>12. Final evaluation on hold-out test set</text:h>
      <text:h text:style-name="P2" text:outline-level="2"><text:bookmark text:name="121-test-set-performance"/>12.1 Test-set performance</text:h>
      <text:list text:style-name="L15">
        <text:list-item>
          <text:p text:style-name="P22"><text:span text:style-name="Strong_20_Emphasis"><text:span text:style-name="T2">process.</text:span></text:span></text:p>
          <text:list>
            <text:list-item>
              <text:p text:style-name="P22">Refit each finalist model on <text:span text:style-name="Strong_20_Emphasis"><text:span text:style-name="T2">training + validation</text:span></text:span> data using the chosen hyperparameters</text:p>
            </text:list-item>
            <text:list-item>
              <text:p text:style-name="P22">Evaluate on the untouched test set</text:p>
            </text:list-item>
          </text:list>
        </text:list-item>
        <text:list-item>
          <text:p text:style-name="P22"><text:span text:style-name="Strong_20_Emphasis"><text:span text:style-name="T2">Record metrics.</text:span></text:span></text:p>
          <text:list>
            <text:list-item>
              <text:p text:style-name="P22">Macro F1, class-wise precision/recall/F1, confusion matrix</text:p>
            </text:list-item>
          </text:list>
        </text:list-item>
        <text:list-item>
          <text:p text:style-name="P22"><text:span text:style-name="Strong_20_Emphasis"><text:span text:style-name="T2">Compare against baseline.</text:span></text:span></text:p>
          <text:list>
            <text:list-item>
              <text:p text:style-name="P22">Show that the chosen model meaningfully beats trivial strategies.</text:p>
            </text:list-item>
          </text:list>
        </text:list-item>
      </text:list>
      <text:h text:style-name="P2" text:outline-level="2"><text:bookmark text:name="122-interpretation-and-error-analysis"/>12.2 Interpretation and error analysis</text:h>
      <text:list text:style-name="L16">
        <text:list-item>
          <text:p text:style-name="P23"><text:span text:style-name="Strong_20_Emphasis"><text:span text:style-name="T2">Inspect errors.</text:span></text:span></text:p>
          <text:list>
            <text:list-item>
              <text:p text:style-name="P23">Look at common misclassification patterns (e.g. buy vs hold confusion)</text:p>
            </text:list-item>
            <text:list-item>
              <text:p text:style-name="P23">Note any systematic issues (e.g. underperformance in high-vol regimes)</text:p>
            </text:list-item>
          </text:list>
        </text:list-item>
        <text:list-item>
          <text:p text:style-name="P23"><text:span text:style-name="Strong_20_Emphasis"><text:span text:style-name="T2">Feature importance / SHAP (optional).</text:span></text:span></text:p>
          <text:list>
            <text:list-item>
              <text:p text:style-name="P23">For tree-based models, look at feature importances to see which features matter most</text:p>
            </text:list-item>
            <text:list-item>
              <text:p text:style-name="P23">Note that this is exploratory, not a final causal conclusion.</text:p>
            </text:list-item>
          </text:list>
        </text:list-item>
      </text:list>
      <text:p text:style-name="Horizontal_20_Line"/>
      <text:h text:style-name="P24" text:outline-level="2"><text:bookmark text:name="notebook-goal-and-scope"/>Notebook goal and scope</text:h>
      <text:list text:style-name="L17">
        <text:list-item>
          <text:p text:style-name="P25">This notebook trains and evaluates <text:span text:style-name="Strong_20_Emphasis"><text:span text:style-name="T2">one specific model</text:span></text:span> for the 1‑month direction classifier using the prepared parquet dataset.</text:p>
        </text:list-item>
        <text:list-item>
          <text:p text:style-name="P25">It:</text:p>
          <text:list>
            <text:list-item>
              <text:p text:style-name="P25">Loads the <text:span text:style-name="Strong_20_Emphasis"><text:span text:style-name="T2">already engineered</text:span></text:span> dataset from <text:span text:style-name="Source_20_Text"><text:span text:style-name="T2">1-month-direction-classifier/2_prepare_data</text:span></text:span>.</text:p>
            </text:list-item>
            <text:list-item>
              <text:p text:style-name="P25">Splits data into <text:span text:style-name="Strong_20_Emphasis"><text:span text:style-name="T2">train/validation/test</text:span></text:span> in a time-aware way.</text:p>
            </text:list-item>
            <text:list-item>
              <text:p text:style-name="P25">Trains <text:span text:style-name="Strong_20_Emphasis"><text:span text:style-name="T2">one chosen model</text:span></text:span> (e.g. <text:span text:style-name="Source_20_Text"><text:span text:style-name="T2">HistGradientBoostingClassifier</text:span></text:span>) plus a simple baseline.</text:p>
            </text:list-item>
            <text:list-item>
              <text:p text:style-name="P25"><text:soft-page-break/>Evaluates performance on validation and test sets with standardized metrics and artifacts.</text:p>
            </text:list-item>
            <text:list-item>
              <text:p text:style-name="P25">Saves all key evaluation results in a <text:span text:style-name="Strong_20_Emphasis"><text:span text:style-name="T2">standardized, machine-readable format</text:span></text:span> (e.g. JSON/CSV + optional plots) under a model-specific name, so you can duplicate this notebook for other models and compare later.</text:p>
            </text:list-item>
          </text:list>
        </text:list-item>
      </text:list>
      <text:p text:style-name="P26">You’ll duplicate this notebook for each of the 5–6 candidate models, changing essentially only:</text:p>
      <text:list text:style-name="L18">
        <text:list-item>
          <text:p text:style-name="P27">the <text:span text:style-name="Strong_20_Emphasis"><text:span text:style-name="T2">model type and hyperparameters</text:span></text:span>,</text:p>
        </text:list-item>
        <text:list-item>
          <text:p text:style-name="P27">the <text:span text:style-name="Strong_20_Emphasis"><text:span text:style-name="T2">model identifier string</text:span></text:span> used in file names.</text:p>
        </text:list-item>
      </text:list>
      <text:p text:style-name="P28"/>
      <text:h text:style-name="P24" text:outline-level="2"><text:bookmark text:name="1-configuration-and-imports"/>1. Configuration and imports</text:h>
      <text:h text:style-name="P24" text:outline-level="2"><text:bookmark text:name="11-notebook-configuration-and-model-identifier"/>1.1 Notebook configuration and model identifier</text:h>
      <text:list text:style-name="L19">
        <text:list-item>
          <text:p text:style-name="P29">Introduce a small configuration section that defines:</text:p>
          <text:list>
            <text:list-item>
              <text:p text:style-name="P29">Path to the parquet dataset (default: <text:span text:style-name="Source_20_Text"><text:span text:style-name="T2">1-month-direction-classifier/2_prepare_data/dataset.parquet</text:span></text:span>).</text:p>
            </text:list-item>
            <text:list-item>
              <text:p text:style-name="P29">Output directory for results (e.g. <text:span text:style-name="Source_20_Text"><text:span text:style-name="T2">1-month-direction-classifier/3_model_evaluation/</text:span></text:span>).</text:p>
            </text:list-item>
            <text:list-item>
              <text:p text:style-name="P29"><text:span text:style-name="Strong_20_Emphasis"><text:span text:style-name="T2">Model identifier</text:span></text:span>, e.g. <text:span text:style-name="Source_20_Text"><text:span text:style-name="T2">MODEL_NAME = "hist_gradient_boosting_baseline"</text:span></text:span> or <text:span text:style-name="Source_20_Text"><text:span text:style-name="T2">MODEL_NAME = "log_reg_baseline"</text:span></text:span>.</text:p>
            </text:list-item>
            <text:list-item>
              <text:p text:style-name="P29">Random seed(s) for reproducibility.</text:p>
            </text:list-item>
          </text:list>
        </text:list-item>
        <text:list-item>
          <text:p text:style-name="P29">Explain that changing <text:span text:style-name="Source_20_Text"><text:span text:style-name="T2">MODEL_NAME</text:span></text:span> and the model configuration in this notebook is the only thing needed to adapt it for another model.</text:p>
        </text:list-item>
      </text:list>
      <text:h text:style-name="P24" text:outline-level="2"><text:bookmark text:name="12-library-imports"/>1.2 Library imports</text:h>
      <text:list text:style-name="L20">
        <text:list-item>
          <text:p text:style-name="P30">Import standard Python and data science libraries:</text:p>
          <text:list>
            <text:list-item>
              <text:p text:style-name="P30"><text:span text:style-name="Source_20_Text"><text:span text:style-name="T2">pandas</text:span></text:span>, <text:span text:style-name="Source_20_Text"><text:span text:style-name="T2">numpy</text:span></text:span>, <text:span text:style-name="Source_20_Text"><text:span text:style-name="T2">pathlib</text:span></text:span>/<text:span text:style-name="Source_20_Text"><text:span text:style-name="T2">os</text:span></text:span>, <text:span text:style-name="Source_20_Text"><text:span text:style-name="T2">json</text:span></text:span> or <text:span text:style-name="Source_20_Text"><text:span text:style-name="T2">yaml</text:span></text:span>, basic plotting (<text:span text:style-name="Source_20_Text"><text:span text:style-name="T2">matplotlib</text:span></text:span>/<text:span text:style-name="Source_20_Text"><text:span text:style-name="T2">seaborn</text:span></text:span>), and scikit-learn components (<text:span text:style-name="Source_20_Text"><text:span text:style-name="T2">model_selection</text:span></text:span>, <text:span text:style-name="Source_20_Text"><text:span text:style-name="T2">metrics</text:span></text:span>, chosen estimator, etc.).</text:p>
            </text:list-item>
          </text:list>
        </text:list-item>
        <text:list-item>
          <text:p text:style-name="P30">Clarify that you will:</text:p>
          <text:list>
            <text:list-item>
              <text:p text:style-name="P30">Use scikit-learn Pipelines to avoid leakage.</text:p>
            </text:list-item>
            <text:list-item>
              <text:p text:style-name="P30">Use <text:span text:style-name="Source_20_Text"><text:span text:style-name="T2">TimeSeriesSplit</text:span></text:span> for internal validation.</text:p>
            </text:list-item>
          </text:list>
        </text:list-item>
      </text:list>
      <text:p text:style-name="P28"/>
      <text:h text:style-name="P24" text:outline-level="2"><text:bookmark text:name="2-load-prepared-dataset"/><text:soft-page-break/>2. Load prepared dataset</text:h>
      <text:h text:style-name="P24" text:outline-level="2"><text:bookmark text:name="21-load-parquet-into-dataframe"/>2.1 Load parquet into DataFrame</text:h>
      <text:list text:style-name="L21">
        <text:list-item>
          <text:p text:style-name="P31">Load the single parquet file into a Pandas DataFrame:</text:p>
          <text:list>
            <text:list-item>
              <text:p text:style-name="P31">Input: path defined in configuration.</text:p>
            </text:list-item>
            <text:list-item>
              <text:p text:style-name="P31">Output: <text:span text:style-name="Source_20_Text"><text:span text:style-name="T2">df_raw</text:span></text:span> (full dataset).</text:p>
            </text:list-item>
          </text:list>
        </text:list-item>
        <text:list-item>
          <text:p text:style-name="P31">Verify:</text:p>
          <text:list>
            <text:list-item>
              <text:p text:style-name="P32">The presence of all expected columns from the PRD:</text:p>
              <text:p text:style-name="P32"/>
            </text:list-item>
          </text:list>
        </text:list-item>
      </text:list>
      <text:p text:style-name="P33">| Column | Full Name | Description |</text:p>
      <text:p text:style-name="P33">|---|---|---|</text:p>
      <text:p text:style-name="P33">| <text:span text:style-name="T8">`symbol`</text:span> | Ticker Symbol | Ticker from universe CSV, standardised for joins (e.g. <text:span text:style-name="T8">`AMZN.US`</text:span>). |</text:p>
      <text:p text:style-name="P33">| <text:span text:style-name="T8">`date`</text:span> | Trading Date | Calendar date of the trading session. |</text:p>
      <text:p text:style-name="P33">| <text:span text:style-name="T8">`open`</text:span> | Open Price | Price at market open. |</text:p>
      <text:p text:style-name="P33">| <text:span text:style-name="T8">`high`</text:span> | High Price | Highest intraday price. |</text:p>
      <text:p text:style-name="P33">| <text:span text:style-name="T8">`low`</text:span> | Low Price | Lowest intraday price. |</text:p>
      <text:p text:style-name="P33">| <text:span text:style-name="T8">`close`</text:span> | Close Price | Price at market close. |</text:p>
      <text:p text:style-name="P33">| <text:span text:style-name="T8">`adj_close`</text:span> | Adjusted Close | Close price adjusted for splits and dividends. |</text:p>
      <text:p text:style-name="P33">| <text:span text:style-name="T8">`volume`</text:span> | Volume | Number of shares traded. |</text:p>
      <text:p text:style-name="P34"/>
      <text:list text:continue-numbering="true" text:style-name="L21">
        <text:list-item>
          <text:list>
            <text:list-item>
              <text:p text:style-name="P32">plus all engineered features including ‘label’.</text:p>
            </text:list-item>
          </text:list>
        </text:list-item>
      </text:list>
      <text:p text:style-name="P33">| Variable | Full Name | Formula | Description |</text:p>
      <text:p text:style-name="P33">|---|---|---|---|</text:p>
      <text:p text:style-name="P33">| <text:span text:style-name="T8">`ret_1d`</text:span> | 1-Day Return | <text:span text:style-name="T8">`close_t / close_{t-1} - 1`</text:span> | Daily simple return. |</text:p>
      <text:p text:style-name="P33">| <text:span text:style-name="T8">`log_ret_1d`</text:span> | 1-Day Log Return | <text:span text:style-name="T8">`ln(close_t / close_{t-1})`</text:span> | Daily log return. |</text:p>
      <text:p text:style-name="P33">| <text:span text:style-name="T8">`tr_range`</text:span> | Intraday Range | <text:span text:style-name="T8">`high_t - low_t`</text:span> | Simple high-low spread. |</text:p>
      <text:p text:style-name="P33">| <text:span text:style-name="T8">`true_range`</text:span> | True Range | <text:span text:style-name="T8">`max(high_t - low_t, \|high_t - close_{t-1}\|, \|low_t - close_{t-1}\|)`</text:span> | Wilder's true range accounting for gaps. |</text:p>
      <text:p text:style-name="P33">| <text:span text:style-name="T8">`ret_5d`</text:span> | 5-Day Return | <text:span text:style-name="T8">`close_t / close_{t-5} - 1`</text:span> | 5-day price change. |</text:p>
      <text:p text:style-name="P33">| <text:span text:style-name="T8">`ret_10d`</text:span> | 10-Day Return | <text:span text:style-name="T8">`close_t / close_{t-10} - 1`</text:span> | 10-day price change. |</text:p>
      <text:p text:style-name="P33">| <text:span text:style-name="T8">`ret_20d`</text:span> | 20-Day Return | <text:span text:style-name="T8">`close_t / close_{t-20} - 1`</text:span> | Approx. 1-month price change. |</text:p>
      <text:p text:style-name="P33">| <text:span text:style-name="T8">`ret_60d`</text:span> | 60-Day Return | <text:span text:style-name="T8">`close_t / close_{t-60} - 1`</text:span> | Approx. 3-month price change. |</text:p>
      <text:p text:style-name="P33">| <text:span text:style-name="T8">`log_ret_5d`</text:span> | 5-Day Log Return | <text:span text:style-name="T8">`ln(close_t / close_{t-5})`</text:span> | 5-day log return. |</text:p>
      <text:p text:style-name="P33">| <text:span text:style-name="T8">`log_ret_20d`</text:span> | 20-Day Log Return | <text:span text:style-name="T8">`ln(close_t / close_{t-20})`</text:span> | 20-day log return. |</text:p>
      <text:p text:style-name="P33">| <text:span text:style-name="T8">`sma_5`</text:span> | 5-Day SMA | <text:span text:style-name="T8">`mean(close, 5)`</text:span> | Short-term trend. |</text:p>
      <text:p text:style-name="P33">| <text:span text:style-name="T8">`sma_20`</text:span> | 20-Day SMA | <text:span text:style-name="T8">`mean(close, 20)`</text:span> | Short-to-medium trend. |</text:p>
      <text:p text:style-name="P33">| <text:span text:style-name="T8">`sma_50`</text:span> | 50-Day SMA | <text:span text:style-name="T8">`mean(close, 50)`</text:span> | Medium-term trend. |</text:p>
      <text:p text:style-name="P33">| <text:span text:style-name="T8">`sma_200`</text:span> | 200-Day SMA | <text:span text:style-name="T8">`mean(close, 200)`</text:span> | Long-term trend. |</text:p>
      <text:p text:style-name="P33"><text:soft-page-break/>| <text:span text:style-name="T8">`close_over_sma_20`</text:span> | Close / SMA20 | <text:span text:style-name="T8">`close_t / sma_20_t`</text:span> | Relative position to short trend. |</text:p>
      <text:p text:style-name="P33">| <text:span text:style-name="T8">`close_over_sma_50`</text:span> | Close / SMA50 | <text:span text:style-name="T8">`close_t / sma_50_t`</text:span> | Relative position to medium trend. |</text:p>
      <text:p text:style-name="P33">| <text:span text:style-name="T8">`close_over_sma_200`</text:span> | Close / SMA200 | <text:span text:style-name="T8">`close_t / sma_200_t`</text:span> | Relative position to long trend. |</text:p>
      <text:p text:style-name="P33">| <text:span text:style-name="T8">`sma_20_slope_5d`</text:span> | SMA20 5-Day Slope | <text:span text:style-name="T8">`sma_20_t / sma_20_{t-5} - 1`</text:span> | Momentum of the 20-day average. |</text:p>
      <text:p text:style-name="P33">| <text:span text:style-name="T8">`sma_50_slope_5d`</text:span> | SMA50 5-Day Slope | <text:span text:style-name="T8">`sma_50_t / sma_50_{t-5} - 1`</text:span> | Momentum of the 50-day average. |</text:p>
      <text:p text:style-name="P33">| <text:span text:style-name="T8">`vol_ret_5d`</text:span> | Return Volatility 5D | <text:span text:style-name="T8">`std(ret_1d, 5)`</text:span> | Short-term return volatility. |</text:p>
      <text:p text:style-name="P33">| <text:span text:style-name="T8">`vol_ret_20d`</text:span> | Return Volatility 20D | <text:span text:style-name="T8">`std(ret_1d, 20)`</text:span> | Medium-term return volatility. |</text:p>
      <text:p text:style-name="P33">| <text:span text:style-name="T8">`vol_ret_60d`</text:span> | Return Volatility 60D | <text:span text:style-name="T8">`std(ret_1d, 60)`</text:span> | Long-term return volatility. |</text:p>
      <text:p text:style-name="P33">| <text:span text:style-name="T8">`vol_tr_5d`</text:span> | True Range Volatility 5D | <text:span text:style-name="T8">`std(true_range, 5)`</text:span> | Short-term price range volatility. |</text:p>
      <text:p text:style-name="P33">| <text:span text:style-name="T8">`vol_tr_20d`</text:span> | True Range Volatility 20D | <text:span text:style-name="T8">`std(true_range, 20)`</text:span> | Medium-term price range volatility. |</text:p>
      <text:p text:style-name="P33">| <text:span text:style-name="T8">`value_traded`</text:span> | Daily Value Traded | <text:span text:style-name="T8">`close_t * volume_t`</text:span> | Proxy for daily liquidity. |</text:p>
      <text:p text:style-name="P33">| <text:span text:style-name="T8">`vol_ma_20`</text:span> | Volume MA 20D | <text:span text:style-name="T8">`mean(volume, 20)`</text:span> | Average volume over 20 days. |</text:p>
      <text:p text:style-name="P33">| <text:span text:style-name="T8">`vol_ma_60`</text:span> | Volume MA 60D | <text:span text:style-name="T8">`mean(volume, 60)`</text:span> | Average volume over 60 days. |</text:p>
      <text:p text:style-name="P33">| <text:span text:style-name="T8">`vol_rel_20`</text:span> | Relative Volume 20D | <text:span text:style-name="T8">`volume_t / vol_ma_20_t`</text:span> | Today's volume relative to 20-day average. |</text:p>
      <text:p text:style-name="P33">| <text:span text:style-name="T8">`value_traded_ma_20`</text:span> | Value Traded MA 20D | <text:span text:style-name="T8">`mean(value_traded, 20)`</text:span> | Smoothed liquidity measure. |</text:p>
      <text:p text:style-name="P33">| <text:span text:style-name="T8">`value_traded_rel_20`</text:span> | Relative Value Traded 20D | <text:span text:style-name="T8">`value_traded_t / value_traded_ma_20_t`</text:span> | Today's liquidity relative to 20-day average. |</text:p>
      <text:p text:style-name="P33">| <text:span text:style-name="T8">`rsi_14`</text:span> | RSI 14 | Wilder RSI of <text:span text:style-name="T8">`close`</text:span>, 14-day | Momentum oscillator (0–100). |</text:p>
      <text:p text:style-name="P33">| <text:span text:style-name="T8">`macd`</text:span> | MACD Line | <text:span text:style-name="T8">`EMA_12(close) - EMA_26(close)`</text:span> | Trend-following momentum indicator. |</text:p>
      <text:p text:style-name="P33">| <text:span text:style-name="T8">`macd_signal`</text:span> | MACD Signal Line | <text:span text:style-name="T8">`EMA_9(macd)`</text:span> | Smoothed MACD for crossover signals. |</text:p>
      <text:p text:style-name="P33">| <text:span text:style-name="T8">`macd_hist`</text:span> | MACD Histogram | <text:span text:style-name="T8">`macd - macd_signal`</text:span> | Distance between MACD and signal. |</text:p>
      <text:p text:style-name="P33">| <text:span text:style-name="T8">`atr_14`</text:span> | ATR 14 | Wilder EMA of <text:span text:style-name="T8">`true_range`</text:span>, 14-day | Average true range normalised volatility. |</text:p>
      <text:p text:style-name="P33">| <text:span text:style-name="T8">`hh_20d`</text:span> | 20-Day Highest High | <text:span text:style-name="T8">`max(high, 20)`</text:span> | Rolling resistance level. |</text:p>
      <text:p text:style-name="P33">| <text:span text:style-name="T8">`ll_20d`</text:span> | 20-Day Lowest Low | <text:span text:style-name="T8">`min(low, 20)`</text:span> | Rolling support level. |</text:p>
      <text:p text:style-name="P33">| <text:span text:style-name="T8">`dist_from_20d_high`</text:span> | Distance from 20D High | <text:span text:style-name="T8">`(close_t / hh_20d_t) - 1`</text:span> | Negative: below recent high. |</text:p>
      <text:p text:style-name="P33">| <text:span text:style-name="T8">`dist_from_20d_low`</text:span> | Distance from 20D Low | <text:span text:style-name="T8">`(close_t / ll_20d_t) - 1`</text:span> | Positive: above recent low. |</text:p>
      <text:p text:style-name="P33">| <text:span text:style-name="T8">`fwd_ret_20d`</text:span> | Forward 20-Day Return | <text:span text:style-name="T8">`close_{t+20} / close_t - 1`</text:span> | Target precursor — future return. |</text:p>
      <text:p text:style-name="P33">| <text:span text:style-name="T8">`label`</text:span> | Direction Label | <text:span text:style-name="T8">`buy`</text:span> / <text:span text:style-name="T8">`sell`</text:span> / <text:span text:style-name="T8">`hold`</text:span> | <text:span text:style-name="T8">`buy`</text:span> if <text:span text:style-name="T8">`fwd_ret_20d &gt; 0.05`</text:span>, <text:span text:style-name="T8">`sell`</text:span> if <text:span text:style-name="T8">`&lt; -0.05`</text:span>, else <text:span text:style-name="T8">`hold`</text:span>. |</text:p>
      <text:p text:style-name="P35"/>
      <text:list text:continue-numbering="true" text:style-name="L21">
        <text:list-item>
          <text:list>
            <text:list-item>
              <text:p text:style-name="P31"><text:soft-page-break/>Check dtypes (e.g. <text:span text:style-name="Source_20_Text"><text:span text:style-name="T2">date</text:span></text:span> as datetime, <text:span text:style-name="Source_20_Text"><text:span text:style-name="T2">label</text:span></text:span> as categorical/string).</text:p>
            </text:list-item>
          </text:list>
        </text:list-item>
      </text:list>
      <text:h text:style-name="P24" text:outline-level="2"><text:bookmark text:name="22-basic-dataset-diagnostics-non-critical-but-usef"/>2.2 Basic dataset diagnostics (non-critical but useful)</text:h>
      <text:list text:style-name="L22">
        <text:list-item>
          <text:p text:style-name="P36">Show:</text:p>
          <text:list>
            <text:list-item>
              <text:p text:style-name="P36">Overall shape (# rows, # columns).</text:p>
            </text:list-item>
            <text:list-item>
              <text:p text:style-name="P36">Date range.</text:p>
            </text:list-item>
            <text:list-item>
              <text:p text:style-name="P36">Number of unique <text:span text:style-name="Source_20_Text"><text:span text:style-name="T2">symbol</text:span></text:span>s.</text:p>
            </text:list-item>
          </text:list>
        </text:list-item>
        <text:list-item>
          <text:p text:style-name="P36">Output: short summary to confirm that the dataset matches expectations before modeling.</text:p>
        </text:list-item>
      </text:list>
      <text:p text:style-name="P28"/>
      <text:h text:style-name="P24" text:outline-level="2"><text:bookmark text:name="3-featuretarget-selection-and-cleaning"/>3. Feature/target selection and cleaning</text:h>
      <text:h text:style-name="P24" text:outline-level="2"><text:bookmark text:name="31-select-features-and-target"/>3.1 Select features and target</text:h>
      <text:list text:style-name="L23">
        <text:list-item>
          <text:p text:style-name="P37">Explicitly define:</text:p>
          <text:list>
            <text:list-item>
              <text:p text:style-name="P37">The list of feature columns to use (all engineered predictors except <text:span text:style-name="Source_20_Text"><text:span text:style-name="T2">fwd_ret_20d</text:span></text:span>, <text:span text:style-name="Source_20_Text"><text:span text:style-name="T2">label</text:span></text:span>, <text:span text:style-name="Source_20_Text"><text:span text:style-name="T2">symbol</text:span></text:span>, <text:span text:style-name="Source_20_Text"><text:span text:style-name="T2">date</text:span></text:span>).</text:p>
            </text:list-item>
            <text:list-item>
              <text:p text:style-name="P37">The target variable: <text:span text:style-name="Source_20_Text"><text:span text:style-name="T2">label</text:span></text:span> (<text:span text:style-name="Source_20_Text"><text:span text:style-name="T2">buy</text:span></text:span>, <text:span text:style-name="Source_20_Text"><text:span text:style-name="T2">hold</text:span></text:span>, <text:span text:style-name="Source_20_Text"><text:span text:style-name="T2">sell</text:span></text:span>).</text:p>
            </text:list-item>
            <text:list-item>
              <text:p text:style-name="P37">Optionally keep <text:span text:style-name="Source_20_Text"><text:span text:style-name="T2">symbol</text:span></text:span> and <text:span text:style-name="Source_20_Text"><text:span text:style-name="T2">date</text:span></text:span> aside for grouping and logging.</text:p>
            </text:list-item>
          </text:list>
        </text:list-item>
        <text:list-item>
          <text:p text:style-name="P37">Create:</text:p>
          <text:list>
            <text:list-item>
              <text:p text:style-name="P37"><text:span text:style-name="Source_20_Text"><text:span text:style-name="T2">X</text:span></text:span> (features DataFrame).</text:p>
            </text:list-item>
            <text:list-item>
              <text:p text:style-name="P37"><text:span text:style-name="Source_20_Text"><text:span text:style-name="T2">y</text:span></text:span> (target Series).</text:p>
            </text:list-item>
            <text:list-item>
              <text:p text:style-name="P37">Optionally, <text:span text:style-name="Source_20_Text"><text:span text:style-name="T2">meta</text:span></text:span> with <text:span text:style-name="Source_20_Text"><text:span text:style-name="T2">symbol</text:span></text:span> and <text:span text:style-name="Source_20_Text"><text:span text:style-name="T2">date</text:span></text:span>.</text:p>
            </text:list-item>
          </text:list>
        </text:list-item>
      </text:list>
      <text:h text:style-name="P24" text:outline-level="2"><text:bookmark text:name="32-drop-rows-with-invalid-labels-or-missing-data"/>3.2 Drop rows with invalid labels or missing data</text:h>
      <text:list text:style-name="L24">
        <text:list-item>
          <text:p text:style-name="P38">Remove:</text:p>
          <text:list>
            <text:list-item>
              <text:p text:style-name="P38">Rows where <text:span text:style-name="Source_20_Text"><text:span text:style-name="T2">label</text:span></text:span> is missing or not in <text:span text:style-name="Source_20_Text"><text:span text:style-name="T2">{buy, hold, sell}</text:span></text:span>.</text:p>
            </text:list-item>
            <text:list-item>
              <text:p text:style-name="P38">Rows where any required feature is <text:span text:style-name="Source_20_Text"><text:span text:style-name="T2">NaN</text:span></text:span> (or apply chosen imputation strategy).</text:p>
            </text:list-item>
          </text:list>
        </text:list-item>
        <text:list-item>
          <text:p text:style-name="P38">Summarize:</text:p>
          <text:list>
            <text:list-item>
              <text:p text:style-name="P38">Remaining number of rows.</text:p>
            </text:list-item>
            <text:list-item>
              <text:p text:style-name="P38">Class distribution of <text:span text:style-name="Source_20_Text"><text:span text:style-name="T2">y</text:span></text:span>.</text:p>
            </text:list-item>
          </text:list>
        </text:list-item>
      </text:list>
      <text:p text:style-name="P28"/>
      <text:h text:style-name="P24" text:outline-level="2"><text:bookmark text:name="4-time-aware-trainvalidationtest-split"/>4. Time-aware train/validation/test split</text:h>
      <text:h text:style-name="P24" text:outline-level="2"><text:bookmark text:name="41-define-chronological-splits"/>4.1 Define chronological splits</text:h>
      <text:list text:style-name="L25">
        <text:list-item>
          <text:p text:style-name="P39">Sort the dataset by <text:span text:style-name="Source_20_Text"><text:span text:style-name="T2">date</text:span></text:span> (and <text:span text:style-name="Source_20_Text"><text:span text:style-name="T2">symbol</text:span></text:span> if needed for stability).</text:p>
        </text:list-item>
        <text:list-item>
          <text:p text:style-name="P39"><text:soft-page-break/>Use the <text:span text:style-name="Strong_20_Emphasis"><text:span text:style-name="T2">last 6 years</text:span></text:span> (if the parquet already contains only 6 years, just verify date range).</text:p>
        </text:list-item>
        <text:list-item>
          <text:p text:style-name="P39">Split by time (no shuffling) into:</text:p>
          <text:list>
            <text:list-item>
              <text:p text:style-name="P39"><text:span text:style-name="Strong_20_Emphasis"><text:span text:style-name="T2">Train</text:span></text:span>: earliest ~70% of time span.</text:p>
            </text:list-item>
            <text:list-item>
              <text:p text:style-name="P39"><text:span text:style-name="Strong_20_Emphasis"><text:span text:style-name="T2">Validation</text:span></text:span>: next ~15% of time span.</text:p>
            </text:list-item>
            <text:list-item>
              <text:p text:style-name="P39"><text:span text:style-name="Strong_20_Emphasis"><text:span text:style-name="T2">Test</text:span></text:span>: most recent ~15% of time span.</text:p>
            </text:list-item>
          </text:list>
        </text:list-item>
        <text:list-item>
          <text:p text:style-name="P39">Save the actual split dates to variables, e.g.:</text:p>
          <text:list>
            <text:list-item>
              <text:p text:style-name="P39"><text:span text:style-name="Source_20_Text"><text:span text:style-name="T2">train_end_date</text:span></text:span></text:p>
            </text:list-item>
            <text:list-item>
              <text:p text:style-name="P39"><text:span text:style-name="Source_20_Text"><text:span text:style-name="T2">val_end_date</text:span></text:span><text:line-break/>so they can be written into results later.</text:p>
            </text:list-item>
          </text:list>
        </text:list-item>
        <text:list-item>
          <text:p text:style-name="P39">Create:</text:p>
          <text:list>
            <text:list-item>
              <text:p text:style-name="P39"><text:span text:style-name="Source_20_Text"><text:span text:style-name="T2">X_train</text:span></text:span>, <text:span text:style-name="Source_20_Text"><text:span text:style-name="T2">y_train</text:span></text:span></text:p>
            </text:list-item>
            <text:list-item>
              <text:p text:style-name="P39"><text:span text:style-name="Source_20_Text"><text:span text:style-name="T2">X_val</text:span></text:span>, <text:span text:style-name="Source_20_Text"><text:span text:style-name="T2">y_val</text:span></text:span></text:p>
            </text:list-item>
            <text:list-item>
              <text:p text:style-name="P39"><text:span text:style-name="Source_20_Text"><text:span text:style-name="T2">X_test</text:span></text:span>, <text:span text:style-name="Source_20_Text"><text:span text:style-name="T2">y_test</text:span></text:span></text:p>
            </text:list-item>
          </text:list>
        </text:list-item>
      </text:list>
      <text:h text:style-name="P24" text:outline-level="2"><text:bookmark text:name="42-sanity-checks-on-splits"/>4.2 Sanity checks on splits</text:h>
      <text:list text:style-name="L26">
        <text:list-item>
          <text:p text:style-name="P40">Confirm:</text:p>
          <text:list>
            <text:list-item>
              <text:p text:style-name="P40">No overlap in dates between splits.</text:p>
            </text:list-item>
            <text:list-item>
              <text:p text:style-name="P40">Class distributions per split (train/val/test) and note potential class imbalance (esp. dominance of <text:span text:style-name="Source_20_Text"><text:span text:style-name="T2">hold</text:span></text:span>).</text:p>
            </text:list-item>
          </text:list>
        </text:list-item>
        <text:list-item>
          <text:p text:style-name="P40">Log:</text:p>
          <text:list>
            <text:list-item>
              <text:p text:style-name="P40">Number of examples per split.</text:p>
            </text:list-item>
            <text:list-item>
              <text:p text:style-name="P40">Class counts per split.</text:p>
            </text:list-item>
          </text:list>
        </text:list-item>
      </text:list>
      <text:p text:style-name="P28"/>
      <text:h text:style-name="P24" text:outline-level="2"><text:bookmark text:name="5-baseline-classifier-simple-reference"/>5. Baseline classifier (simple reference)</text:h>
      <text:h text:style-name="P24" text:outline-level="2"><text:bookmark text:name="51-define-and-train-baseline"/>5.1 Define and train baseline</text:h>
      <text:list text:style-name="L27">
        <text:list-item>
          <text:p text:style-name="P41">Choose a simple baseline, e.g.:</text:p>
          <text:list>
            <text:list-item>
              <text:p text:style-name="P41">Always predicting the <text:span text:style-name="Strong_20_Emphasis"><text:span text:style-name="T2">majority class</text:span></text:span> from the training set, or</text:p>
            </text:list-item>
            <text:list-item>
              <text:p text:style-name="P41">A trivial rule: <text:span text:style-name="Source_20_Text"><text:span text:style-name="T2">buy</text:span></text:span> if <text:span text:style-name="Source_20_Text"><text:span text:style-name="T2">ret_20d</text:span></text:span> &gt; 0 else <text:span text:style-name="Source_20_Text"><text:span text:style-name="T2">sell/hold</text:span></text:span>.</text:p>
            </text:list-item>
          </text:list>
        </text:list-item>
        <text:list-item>
          <text:p text:style-name="P41">Train/fix this baseline using training data only.</text:p>
        </text:list-item>
      </text:list>
      <text:h text:style-name="P24" text:outline-level="2"><text:bookmark text:name="52-evaluate-baseline-on-validation-and-test"/>5.2 Evaluate baseline on validation and test</text:h>
      <text:list text:style-name="L28">
        <text:list-item>
          <text:p text:style-name="P42">Compute for baseline:</text:p>
          <text:list>
            <text:list-item>
              <text:p text:style-name="P42">Macro F1 and weighted F1 (validation and test).</text:p>
            </text:list-item>
            <text:list-item>
              <text:p text:style-name="P42"><text:soft-page-break/>Confusion matrices.</text:p>
            </text:list-item>
            <text:list-item>
              <text:p text:style-name="P42">Class-wise precision/recall/F1.</text:p>
            </text:list-item>
          </text:list>
        </text:list-item>
        <text:list-item>
          <text:p text:style-name="P42">Summarize results in a small structure (e.g. <text:span text:style-name="Source_20_Text"><text:span text:style-name="T2">baseline_results</text:span></text:span>) to be later included in the standardized output.</text:p>
        </text:list-item>
      </text:list>
      <text:p text:style-name="P28"/>
      <text:h text:style-name="P24" text:outline-level="2"><text:bookmark text:name="6-model-definition-and-training-single-candidate"/>6. Model definition and training (single candidate)</text:h>
      <text:h text:style-name="P24" text:outline-level="2"><text:bookmark text:name="61-choose-and-configure-the-model"/>6.1 Choose and configure the model</text:h>
      <text:list text:style-name="L29">
        <text:list-item>
          <text:p text:style-name="P43">Specify that this notebook is for <text:span text:style-name="Strong_20_Emphasis"><text:span text:style-name="T2">one model</text:span></text:span> only, e.g.:</text:p>
          <text:list>
            <text:list-item>
              <text:p text:style-name="P43"><text:span text:style-name="Source_20_Text"><text:span text:style-name="T2">HistGradientBoostingClassifier</text:span></text:span> with some default/mildly-tuned hyperparameters, or</text:p>
            </text:list-item>
            <text:list-item>
              <text:p text:style-name="P43"><text:span text:style-name="Source_20_Text"><text:span text:style-name="T2">LogisticRegression</text:span></text:span> in multinomial mode, or</text:p>
            </text:list-item>
            <text:list-item>
              <text:p text:style-name="P43"><text:span text:style-name="Source_20_Text"><text:span text:style-name="T2">RandomForestClassifier</text:span></text:span>.</text:p>
            </text:list-item>
          </text:list>
        </text:list-item>
        <text:list-item>
          <text:p text:style-name="P43">Document:</text:p>
          <text:list>
            <text:list-item>
              <text:p text:style-name="P43">The exact model class and key hyperparameters used (even if default).</text:p>
            </text:list-item>
            <text:list-item>
              <text:p text:style-name="P43">Any <text:span text:style-name="Strong_20_Emphasis"><text:span text:style-name="T2">class_weight</text:span></text:span> logic (e.g. <text:span text:style-name="Source_20_Text"><text:span text:style-name="T2">balanced</text:span></text:span> or custom weights) to handle class imbalance.</text:p>
            </text:list-item>
          </text:list>
        </text:list-item>
      </text:list>
      <text:h text:style-name="P24" text:outline-level="2"><text:bookmark text:name="62-preprocessing-pipeline"/>6.2 Preprocessing pipeline</text:h>
      <text:list text:style-name="L30">
        <text:list-item>
          <text:p text:style-name="P44">Decide and document:</text:p>
          <text:list>
            <text:list-item>
              <text:p text:style-name="P44">Whether the model requires feature scaling (e.g. logistic regression) or not (tree-based).</text:p>
            </text:list-item>
            <text:list-item>
              <text:p text:style-name="P44">If scaling is needed, indicate that you’ll use <text:span text:style-name="Source_20_Text"><text:span text:style-name="T2">StandardScaler</text:span></text:span> fitted on training data only.</text:p>
            </text:list-item>
          </text:list>
        </text:list-item>
        <text:list-item>
          <text:p text:style-name="P44">Build a conceptual scikit-learn <text:span text:style-name="Source_20_Text"><text:span text:style-name="T2">Pipeline</text:span></text:span>:</text:p>
          <text:list>
            <text:list-item>
              <text:p text:style-name="P44">For example: <text:span text:style-name="Source_20_Text"><text:span text:style-name="T2">Pipeline([("scaler", StandardScaler()), ("clf", HistGradientBoostingClassifier(...))])</text:span></text:span></text:p>
            </text:list-item>
            <text:list-item>
              <text:p text:style-name="P44">The notebook should explain that the Pipeline helps avoid leakage and keeps preprocessing consistent.</text:p>
            </text:list-item>
          </text:list>
        </text:list-item>
      </text:list>
      <text:h text:style-name="P24" text:outline-level="2"><text:bookmark text:name="63-fit-model-on-training-set"/>6.3 Fit model on training set</text:h>
      <text:list text:style-name="L31">
        <text:list-item>
          <text:p text:style-name="P45">Train the pipeline/model on <text:span text:style-name="Source_20_Text"><text:span text:style-name="T2">X_train</text:span></text:span>, <text:span text:style-name="Source_20_Text"><text:span text:style-name="T2">y_train</text:span></text:span>.</text:p>
        </text:list-item>
        <text:list-item>
          <text:p text:style-name="P45">Note training time (even roughly) and any warnings.</text:p>
        </text:list-item>
      </text:list>
      <text:p text:style-name="P28"/>
      <text:h text:style-name="P24" text:outline-level="2"><text:bookmark text:name="7-validation-performance-and-diagnostics"/><text:soft-page-break/>7. Validation performance and diagnostics</text:h>
      <text:h text:style-name="P24" text:outline-level="2"><text:bookmark text:name="71-prediction-on-validation-set"/>7.1 Prediction on validation set</text:h>
      <text:list text:style-name="L32">
        <text:list-item>
          <text:p text:style-name="P46">Use the trained model to predict:</text:p>
          <text:list>
            <text:list-item>
              <text:p text:style-name="P46">Class labels (<text:span text:style-name="Source_20_Text"><text:span text:style-name="T2">y_val_pred</text:span></text:span>).</text:p>
            </text:list-item>
            <text:list-item>
              <text:p text:style-name="P46">Class probabilities (<text:span text:style-name="Source_20_Text"><text:span text:style-name="T2">y_val_proba</text:span></text:span>) if available (not required for all models, but useful for later).</text:p>
            </text:list-item>
          </text:list>
        </text:list-item>
      </text:list>
      <text:h text:style-name="P24" text:outline-level="2"><text:bookmark text:name="72-compute-validation-metrics"/>7.2 Compute validation metrics</text:h>
      <text:list text:style-name="L33">
        <text:list-item>
          <text:p text:style-name="P47">Compute on validation set:</text:p>
          <text:list>
            <text:list-item>
              <text:p text:style-name="P47">Macro F1</text:p>
            </text:list-item>
            <text:list-item>
              <text:p text:style-name="P47">Weighted F1</text:p>
            </text:list-item>
            <text:list-item>
              <text:p text:style-name="P47">Class-wise precision, recall, F1 for <text:span text:style-name="Source_20_Text"><text:span text:style-name="T2">buy</text:span></text:span>, <text:span text:style-name="Source_20_Text"><text:span text:style-name="T2">hold</text:span></text:span>, <text:span text:style-name="Source_20_Text"><text:span text:style-name="T2">sell</text:span></text:span></text:p>
            </text:list-item>
            <text:list-item>
              <text:p text:style-name="P47">Balanced accuracy</text:p>
            </text:list-item>
            <text:list-item>
              <text:p text:style-name="P47">Confusion matrix</text:p>
            </text:list-item>
          </text:list>
        </text:list-item>
        <text:list-item>
          <text:p text:style-name="P47">Present results in:</text:p>
          <text:list>
            <text:list-item>
              <text:p text:style-name="P47">A nicely formatted table (for human inspection).</text:p>
            </text:list-item>
            <text:list-item>
              <text:p text:style-name="P47">A JSON-like Python dict (<text:span text:style-name="Source_20_Text"><text:span text:style-name="T2">val_metrics</text:span></text:span>) capturing all metrics keyed by name.</text:p>
            </text:list-item>
          </text:list>
        </text:list-item>
      </text:list>
      <text:h text:style-name="P24" text:outline-level="2"><text:bookmark text:name="73-optional-validation-plots"/>7.3 Optional validation plots</text:h>
      <text:list text:style-name="L34">
        <text:list-item>
          <text:p text:style-name="P48">Optional but useful diagnostic plots:</text:p>
          <text:list>
            <text:list-item>
              <text:p text:style-name="P48">Normalized confusion matrix heatmap.</text:p>
            </text:list-item>
            <text:list-item>
              <text:p text:style-name="P48">Bar plots of class-wise F1 or recall.</text:p>
            </text:list-item>
          </text:list>
        </text:list-item>
        <text:list-item>
          <text:p text:style-name="P48">Note that these are <text:span text:style-name="Strong_20_Emphasis"><text:span text:style-name="T2">not</text:span></text:span> part of the standardized machine-readable output but useful for interpretation.</text:p>
        </text:list-item>
      </text:list>
      <text:p text:style-name="P28"/>
      <text:h text:style-name="P24" text:outline-level="2"><text:bookmark text:name="8-test-performance-final-hold-out"/>8. Test performance (final hold-out)</text:h>
      <text:h text:style-name="P24" text:outline-level="2"><text:bookmark text:name="81-final-refit-optional"/>8.1 Final refit (optional)</text:h>
      <text:list text:style-name="L35">
        <text:list-item>
          <text:p text:style-name="P49">Option A (simple):</text:p>
          <text:list>
            <text:list-item>
              <text:p text:style-name="P49">Train the chosen model only once on <text:span text:style-name="Source_20_Text"><text:span text:style-name="T2">X_train</text:span></text:span> and use that for both validation and test.</text:p>
            </text:list-item>
          </text:list>
        </text:list-item>
        <text:list-item>
          <text:p text:style-name="P49">Option B (more rigorous):</text:p>
          <text:list>
            <text:list-item>
              <text:p text:style-name="P49">After settling hyperparameters (even default ones), <text:span text:style-name="Strong_20_Emphasis"><text:span text:style-name="T2">refit</text:span></text:span> the model on <text:span text:style-name="Source_20_Text"><text:span text:style-name="T2">X_train ∪ X_val</text:span></text:span> and then evaluate on <text:span text:style-name="Source_20_Text"><text:span text:style-name="T2">X_test</text:span></text:span>.</text:p>
            </text:list-item>
          </text:list>
        </text:list-item>
        <text:list-item>
          <text:p text:style-name="P49"><text:soft-page-break/>In this initial notebook, you can choose either and document which you use.</text:p>
          <text:list>
            <text:list-item>
              <text:p text:style-name="P49">For now, Option A is simpler; Option B is what you’d do later when a model is selected.</text:p>
            </text:list-item>
          </text:list>
        </text:list-item>
      </text:list>
      <text:h text:style-name="P24" text:outline-level="2"><text:bookmark text:name="82-prediction-on-test-set"/>8.2 Prediction on test set</text:h>
      <text:list text:style-name="L36">
        <text:list-item>
          <text:p text:style-name="P50">Predict:</text:p>
          <text:list>
            <text:list-item>
              <text:p text:style-name="P50"><text:span text:style-name="Source_20_Text"><text:span text:style-name="T2">y_test_pred</text:span></text:span> and optionally <text:span text:style-name="Source_20_Text"><text:span text:style-name="T2">y_test_proba</text:span></text:span>.</text:p>
            </text:list-item>
          </text:list>
        </text:list-item>
      </text:list>
      <text:h text:style-name="P24" text:outline-level="2"><text:bookmark text:name="83-compute-test-metrics"/>8.3 Compute test metrics</text:h>
      <text:list text:style-name="L37">
        <text:list-item>
          <text:p text:style-name="P51">Compute on test set:</text:p>
          <text:list>
            <text:list-item>
              <text:p text:style-name="P51">Macro F1</text:p>
            </text:list-item>
            <text:list-item>
              <text:p text:style-name="P51">Weighted F1</text:p>
            </text:list-item>
            <text:list-item>
              <text:p text:style-name="P51">Class-wise precision/recall/F1</text:p>
            </text:list-item>
            <text:list-item>
              <text:p text:style-name="P51">Balanced accuracy</text:p>
            </text:list-item>
            <text:list-item>
              <text:p text:style-name="P51">Confusion matrix</text:p>
            </text:list-item>
          </text:list>
        </text:list-item>
        <text:list-item>
          <text:p text:style-name="P51">Store these metrics in another dict, e.g. <text:span text:style-name="Source_20_Text"><text:span text:style-name="T2">test_metrics</text:span></text:span>, in the same schema as <text:span text:style-name="Source_20_Text"><text:span text:style-name="T2">val_metrics</text:span></text:span>.</text:p>
        </text:list-item>
      </text:list>
      <text:p text:style-name="P28"/>
      <text:h text:style-name="P24" text:outline-level="2"><text:bookmark text:name="9-standardized-result-packaging-and-saving"/>9. Standardized result packaging and saving</text:h>
      <text:h text:style-name="P24" text:outline-level="2"><text:bookmark text:name="91-common-result-schema"/>9.1 Common result schema</text:h>
      <text:list text:style-name="L38">
        <text:list-item>
          <text:p text:style-name="P52">Define a standard Python dict structure for results, for example:</text:p>
          <text:p text:style-name="P53">text</text:p>
          <text:p text:style-name="P54"><text:span text:style-name="Source_20_Text"><text:span text:style-name="T2">results = {</text:span></text:span></text:p>
          <text:p text:style-name="P55"><text:span text:style-name="Source_20_Text"><text:span text:style-name="T2"><text:s text:c="4"/>"model_name": MODEL_NAME,</text:span></text:span></text:p>
          <text:p text:style-name="P55"><text:span text:style-name="Source_20_Text"><text:span text:style-name="T2"><text:s text:c="4"/>"model_type": "&lt;full sklearn class name&gt;",</text:span></text:span></text:p>
          <text:p text:style-name="P55"><text:span text:style-name="Source_20_Text"><text:span text:style-name="T2"><text:s text:c="4"/>"hyperparameters": {...}, <text:s text:c="10"/># as dict of model params</text:span></text:span></text:p>
          <text:p text:style-name="P55"><text:span text:style-name="Source_20_Text"><text:span text:style-name="T2"><text:s text:c="4"/>"data": {</text:span></text:span></text:p>
          <text:p text:style-name="P55"><text:span text:style-name="Source_20_Text"><text:span text:style-name="T2"><text:s text:c="8"/>"train_start": ...,</text:span></text:span></text:p>
          <text:p text:style-name="P55"><text:span text:style-name="Source_20_Text"><text:span text:style-name="T2"><text:s text:c="8"/>"train_end": ...,</text:span></text:span></text:p>
          <text:p text:style-name="P55"><text:span text:style-name="Source_20_Text"><text:span text:style-name="T2"><text:s text:c="8"/>"val_start": ...,</text:span></text:span></text:p>
          <text:p text:style-name="P55"><text:span text:style-name="Source_20_Text"><text:span text:style-name="T2"><text:s text:c="8"/>"val_end": ...,</text:span></text:span></text:p>
          <text:p text:style-name="P55"><text:span text:style-name="Source_20_Text"><text:span text:style-name="T2"><text:s text:c="8"/>"test_start": ...,</text:span></text:span></text:p>
          <text:p text:style-name="P55"><text:span text:style-name="Source_20_Text"><text:span text:style-name="T2"><text:s text:c="8"/>"test_end": ...,</text:span></text:span></text:p>
          <text:p text:style-name="P55"><text:span text:style-name="Source_20_Text"><text:span text:style-name="T2"><text:s text:c="8"/>"n_train": ...,</text:span></text:span></text:p>
          <text:p text:style-name="P55"><text:span text:style-name="Source_20_Text"><text:span text:style-name="T2"><text:s text:c="8"/>"n_val": ...,</text:span></text:span></text:p>
          <text:p text:style-name="P55"><text:span text:style-name="Source_20_Text"><text:span text:style-name="T2"><text:s text:c="8"/>"n_test": ...,</text:span></text:span></text:p>
          <text:p text:style-name="P55"><text:soft-page-break/><text:span text:style-name="Source_20_Text"><text:span text:style-name="T2"><text:s text:c="4"/>},</text:span></text:span></text:p>
          <text:p text:style-name="P55"><text:span text:style-name="Source_20_Text"><text:span text:style-name="T2"><text:s text:c="4"/>"class_labels": ["buy", "hold", "sell"],</text:span></text:span></text:p>
          <text:p text:style-name="P55"><text:span text:style-name="Source_20_Text"><text:span text:style-name="T2"><text:s text:c="4"/>"baseline": {</text:span></text:span></text:p>
          <text:p text:style-name="P55"><text:span text:style-name="Source_20_Text"><text:span text:style-name="T2"><text:s text:c="8"/>"val": {...metrics...},</text:span></text:span></text:p>
          <text:p text:style-name="P55"><text:span text:style-name="Source_20_Text"><text:span text:style-name="T2"><text:s text:c="8"/>"test": {...metrics...}</text:span></text:span></text:p>
          <text:p text:style-name="P55"><text:span text:style-name="Source_20_Text"><text:span text:style-name="T2"><text:s text:c="4"/>},</text:span></text:span></text:p>
          <text:p text:style-name="P55"><text:span text:style-name="Source_20_Text"><text:span text:style-name="T2"><text:s text:c="4"/>"metrics": {</text:span></text:span></text:p>
          <text:p text:style-name="P55"><text:span text:style-name="Source_20_Text"><text:span text:style-name="T2"><text:s text:c="8"/>"val": {...metrics...}, <text:s text:c="8"/># macro F1, weighted F1, per-class metrics, balanced accuracy</text:span></text:span></text:p>
          <text:p text:style-name="P55"><text:span text:style-name="Source_20_Text"><text:span text:style-name="T2"><text:s text:c="8"/>"test": {...metrics...}</text:span></text:span></text:p>
          <text:p text:style-name="P55"><text:span text:style-name="Source_20_Text"><text:span text:style-name="T2"><text:s text:c="4"/>},</text:span></text:span></text:p>
          <text:p text:style-name="P55"><text:span text:style-name="Source_20_Text"><text:span text:style-name="T2"><text:s text:c="4"/>"notes": {</text:span></text:span></text:p>
          <text:p text:style-name="P55"><text:span text:style-name="Source_20_Text"><text:span text:style-name="T2"><text:s text:c="8"/>"threshold_buy": 0.05,</text:span></text:span></text:p>
          <text:p text:style-name="P55"><text:span text:style-name="Source_20_Text"><text:span text:style-name="T2"><text:s text:c="8"/>"threshold_sell": -0.05,</text:span></text:span></text:p>
          <text:p text:style-name="P55"><text:span text:style-name="Source_20_Text"><text:span text:style-name="T2"><text:s text:c="8"/>"label_definition": "buy if fwd_ret_20d &gt; 0.05, sell if &lt; -0.05, else hold",</text:span></text:span></text:p>
          <text:p text:style-name="P55"><text:span text:style-name="Source_20_Text"><text:span text:style-name="T2"><text:s text:c="8"/>"class_weight_strategy": "...",</text:span></text:span></text:p>
          <text:p text:style-name="P55"><text:span text:style-name="Source_20_Text"><text:span text:style-name="T2"><text:s text:c="4"/>}</text:span></text:span></text:p>
          <text:p text:style-name="P56"><text:span text:style-name="Source_20_Text"><text:span text:style-name="T2">}</text:span></text:span></text:p>
        </text:list-item>
        <text:list-item>
          <text:p text:style-name="P52">Describe exactly what goes into each section.</text:p>
        </text:list-item>
      </text:list>
      <text:h text:style-name="P24" text:outline-level="2"><text:bookmark text:name="92-file-naming-convention"/>9.2 File naming convention</text:h>
      <text:list text:style-name="L39">
        <text:list-item>
          <text:p text:style-name="P57">Decide a consistent pattern, e.g.:</text:p>
          <text:list>
            <text:list-item>
              <text:p text:style-name="P57">JSON metrics:<text:line-break/><text:span text:style-name="Source_20_Text"><text:span text:style-name="T2">3_model_evaluation/{MODEL_NAME}_metrics.json</text:span></text:span></text:p>
            </text:list-item>
            <text:list-item>
              <text:p text:style-name="P57">Optional CSV with per-row predictions for test set:<text:line-break/><text:span text:style-name="Source_20_Text"><text:span text:style-name="T2">3_model_evaluation/{MODEL_NAME}_test_predictions.csv</text:span></text:span></text:p>
            </text:list-item>
            <text:list-item>
              <text:p text:style-name="P57">Optional pickled model:<text:line-break/><text:span text:style-name="Source_20_Text"><text:span text:style-name="T2">3_model_evaluation/{MODEL_NAME}_model.pkl</text:span></text:span></text:p>
            </text:list-item>
          </text:list>
        </text:list-item>
        <text:list-item>
          <text:p text:style-name="P57">Document this naming scheme so all notebooks use it.</text:p>
        </text:list-item>
      </text:list>
      <text:h text:style-name="P24" text:outline-level="2"><text:bookmark text:name="93-save-results-to-disk"/>9.3 Save results to disk</text:h>
      <text:list text:style-name="L40">
        <text:list-item>
          <text:p text:style-name="P58">Serialize <text:span text:style-name="Source_20_Text"><text:span text:style-name="T2">results</text:span></text:span> to JSON (or YAML) in the output directory.</text:p>
        </text:list-item>
        <text:list-item>
          <text:p text:style-name="P58">Optionally, save:</text:p>
          <text:list>
            <text:list-item>
              <text:p text:style-name="P58">Test-set predictions along with <text:span text:style-name="Source_20_Text"><text:span text:style-name="T2">symbol</text:span></text:span>, <text:span text:style-name="Source_20_Text"><text:span text:style-name="T2">date</text:span></text:span>, true <text:span text:style-name="Source_20_Text"><text:span text:style-name="T2">label</text:span></text:span>, and predicted <text:span text:style-name="Source_20_Text"><text:span text:style-name="T2">label</text:span></text:span> to a CSV.</text:p>
            </text:list-item>
            <text:list-item>
              <text:p text:style-name="P58">The trained model (pickled) if you want to reuse it.</text:p>
            </text:list-item>
          </text:list>
        </text:list-item>
      </text:list>
      <text:p text:style-name="P28"><text:soft-page-break/></text:p>
      <text:h text:style-name="P24" text:outline-level="2"><text:bookmark text:name="10-summary-and-next-steps"/>10. Summary and next steps</text:h>
      <text:h text:style-name="P24" text:outline-level="2"><text:bookmark text:name="101-notebook-summary-cell"/>10.1 Notebook summary cell</text:h>
      <text:list text:style-name="L41">
        <text:list-item>
          <text:p text:style-name="P59">Summarize:</text:p>
          <text:list>
            <text:list-item>
              <text:p text:style-name="P59">Chosen model and configuration.</text:p>
            </text:list-item>
            <text:list-item>
              <text:p text:style-name="P59">Key validation and test metrics (macro F1, class-wise performance).</text:p>
            </text:list-item>
            <text:list-item>
              <text:p text:style-name="P59">How it compares to the baseline.</text:p>
            </text:list-item>
          </text:list>
        </text:list-item>
        <text:list-item>
          <text:p text:style-name="P59">State that:</text:p>
          <text:list>
            <text:list-item>
              <text:p text:style-name="P59">This notebook defines the <text:span text:style-name="Strong_20_Emphasis"><text:span text:style-name="T2">template</text:span></text:span> for model-specific training and evaluation.</text:p>
            </text:list-item>
            <text:list-item>
              <text:p text:style-name="P59">To evaluate a different model, you will:</text:p>
              <text:list>
                <text:list-item>
                  <text:p text:style-name="P59">Duplicate the notebook,</text:p>
                </text:list-item>
                <text:list-item>
                  <text:p text:style-name="P59">Change the <text:span text:style-name="Strong_20_Emphasis"><text:span text:style-name="T2">model class and hyperparameters</text:span></text:span> in Section 6, and</text:p>
                </text:list-item>
                <text:list-item>
                  <text:p text:style-name="P59">Update <text:span text:style-name="Source_20_Text"><text:span text:style-name="T2">MODEL_NAME</text:span></text:span>.</text:p>
                </text:list-item>
              </text:list>
            </text:list-item>
          </text:list>
        </text:list-item>
      </text:list>
      <text:h text:style-name="P24" text:outline-level="2"><text:bookmark text:name="102-future-improvements-for-a-separate-tuning-note"/>10.2 Future improvements (for a separate tuning notebook)</text:h>
      <text:list text:style-name="L42">
        <text:list-item>
          <text:p text:style-name="P60">Briefly list what a separate “tuning notebook” would add:</text:p>
          <text:list>
            <text:list-item>
              <text:p text:style-name="P60">TimeSeriesSplit-based hyperparameter search.</text:p>
            </text:list-item>
            <text:list-item>
              <text:p text:style-name="P60">Comparison of multiple models via standardized result files.</text:p>
            </text:list-item>
            <text:list-item>
              <text:p text:style-name="P60">Deeper error analysis and potentially regime-based slices.</text:p>
            </text:list-item>
          </text:list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2T15:35:06.863294500</meta:creation-date>
    <dc:date>2026-04-19T17:50:21.608632700</dc:date>
    <meta:editing-duration>PT1H15M23S</meta:editing-duration>
    <meta:editing-cycles>3</meta:editing-cycles>
    <meta:generator>LibreOffice/26.2.2.2$Windows_X86_64 LibreOffice_project/1f77d10d6938fd34972958f64b2bcfa54f8b1ba5</meta:generator>
    <meta:document-statistic meta:table-count="0" meta:image-count="0" meta:object-count="0" meta:page-count="17" meta:paragraph-count="445" meta:word-count="3948" meta:character-count="24097" meta:non-whitespace-character-count="20681"/>
  </office:meta>
</office:document-meta>
</file>