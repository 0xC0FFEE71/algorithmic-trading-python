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text-indent="0in" style:auto-text-indent="false" fo:padding="0in" fo:border="none"/>
    </style:style>
    <style:style style:name="P2" style:family="paragraph" style:parent-style-name="Text_20_body" style:list-style-name="L1">
      <style:paragraph-properties fo:margin-left="0in" fo:margin-right="0in" fo:text-indent="0in" style:auto-text-indent="false" fo:padding="0in" fo:border="none"/>
    </style:style>
    <style:style style:name="P3" style:family="paragraph" style:parent-style-name="Text_20_body" style:list-style-name="L2">
      <style:paragraph-properties fo:margin-left="0in" fo:margin-right="0in" fo:text-indent="0in" style:auto-text-indent="false" fo:padding="0in" fo:border="none"/>
    </style:style>
    <style:style style:name="T1" style:family="text">
      <style:text-properties officeooo:rsid="0021bc54"/>
    </style:style>
    <style:style style:name="T2" style:family="text">
      <style:text-properties loext:padding="0in" loext:border="non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upyter Notebook <text:span text:style-name="T1">#file name </text:span>already contains the full structure:</text:p>
      <text:list text:style-name="L1">
        <text:list-item>
          <text:p text:style-name="P2">All sections and subsections are defined as Markdown cells.</text:p>
        </text:list-item>
        <text:list-item>
          <text:p text:style-name="P2">Each Markdown cell describes what the <text:span text:style-name="Strong_20_Emphasis"><text:span text:style-name="T2">immediately following empty code cell</text:span></text:span> should do.</text:p>
        </text:list-item>
        <text:list-item>
          <text:p text:style-name="P2">Code cells are currently empty placeholders.</text:p>
        </text:list-item>
      </text:list>
      <text:p text:style-name="P1">Your task:</text:p>
      <text:list text:style-name="L2">
        <text:list-item>
          <text:p text:style-name="P3">Go through the notebook from top to bottom.</text:p>
        </text:list-item>
        <text:list-item>
          <text:p text:style-name="P3">For each empty code cell, read the preceding Markdown cell carefully and <text:span text:style-name="Strong_20_Emphasis"><text:span text:style-name="T2">implement the described behavior</text:span></text:span> in idiomatic Python.</text:p>
        </text:list-item>
        <text:list-item>
          <text:p text:style-name="P3">Use standard data/ML libraries where appropriate (pandas, numpy, matplotlib/seaborn, scikit-learn, etc.).</text:p>
        </text:list-item>
        <text:list-item>
          <text:p text:style-name="P3">Do <text:span text:style-name="Strong_20_Emphasis"><text:span text:style-name="T2">not</text:span></text:span> change or reorder any Markdown cells. Only fill in the code cells.</text:p>
        </text:list-item>
        <text:list-item>
          <text:p text:style-name="P3">Respect dependencies between cells: assume the notebook will be executed in order, reusing variables and objects created in earlier cells instead of redefining them.</text:p>
        </text:list-item>
      </text:list>
      <text:p text:style-name="P1">Please fill in all currently empty code cells according to their Markdown descriptions. write the code into the respective code cells, test run all cells and apply necessary changes in case of errors. </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18T22:04:57.529418900</meta:creation-date>
    <dc:date>2026-04-26T18:25:32.016120600</dc:date>
    <meta:editing-duration>PT25M31S</meta:editing-duration>
    <meta:editing-cycles>2</meta:editing-cycles>
    <meta:generator>LibreOffice/26.2.2.2$Windows_X86_64 LibreOffice_project/1f77d10d6938fd34972958f64b2bcfa54f8b1ba5</meta:generator>
    <meta:document-statistic meta:table-count="0" meta:image-count="0" meta:object-count="0" meta:page-count="1" meta:paragraph-count="11" meta:word-count="156" meta:character-count="984" meta:non-whitespace-character-count="846"/>
  </office:meta>
</office:document-meta>
</file>