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officeooo:rsid="0021bc54"/>
    </style:style>
    <style:style style:name="T2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pyter Notebook <text:span text:style-name="T1">#file name </text:span>already contains the full structure:</text:p>
      <text:list text:style-name="L1">
        <text:list-item>
          <text:p text:style-name="P2">All sections and subsections are defined as Markdown cells.</text:p>
        </text:list-item>
        <text:list-item>
          <text:p text:style-name="P2">Each Markdown cell describes what the <text:span text:style-name="Strong_20_Emphasis"><text:span text:style-name="T2">immediately following empty code cell</text:span></text:span> should do.</text:p>
        </text:list-item>
        <text:list-item>
          <text:p text:style-name="P2">Code cells are currently empty placeholders.</text:p>
        </text:list-item>
      </text:list>
      <text:p text:style-name="P1">Your task:</text:p>
      <text:list text:style-name="L2">
        <text:list-item>
          <text:p text:style-name="P3">Go through the notebook from top to bottom.</text:p>
        </text:list-item>
        <text:list-item>
          <text:p text:style-name="P3">For each empty code cell, read the preceding Markdown cell carefully and <text:span text:style-name="Strong_20_Emphasis"><text:span text:style-name="T2">implement the described behavior</text:span></text:span> in idiomatic Python.</text:p>
        </text:list-item>
        <text:list-item>
          <text:p text:style-name="P3">Use standard data/ML libraries where appropriate (pandas, numpy, matplotlib/seaborn, scikit-learn, etc.).</text:p>
        </text:list-item>
        <text:list-item>
          <text:p text:style-name="P3">Do <text:span text:style-name="Strong_20_Emphasis"><text:span text:style-name="T2">not</text:span></text:span> change or reorder any Markdown cells. Only fill in the code cells.</text:p>
        </text:list-item>
        <text:list-item>
          <text:p text:style-name="P3">Respect dependencies between cells: assume the notebook will be executed in order, reusing variables and objects created in earlier cells instead of redefining them.</text:p>
        </text:list-item>
      </text:list>
      <text:p text:style-name="P1">Please fill in all currently empty code cells according to their Markdown descrip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22:04:57.529418900</meta:creation-date>
    <dc:date>2026-04-18T22:50:00.224961400</dc:date>
    <meta:editing-duration>PT12M1S</meta:editing-duration>
    <meta:editing-cycles>1</meta:editing-cycles>
    <meta:document-statistic meta:table-count="0" meta:image-count="0" meta:object-count="0" meta:page-count="1" meta:paragraph-count="11" meta:word-count="136" meta:character-count="870" meta:non-whitespace-character-count="753"/>
    <meta:generator>LibreOffice/26.2.2.2$Windows_X86_64 LibreOffice_project/1f77d10d6938fd34972958f64b2bcfa54f8b1ba5</meta:generator>
  </office:meta>
</office:document-meta>
</file>